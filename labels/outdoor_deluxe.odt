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FB000001B894071158.png" manifest:media-type="image/png"/>
  <manifest:file-entry manifest:full-path="Pictures/100000000000037A0000075F3A40A28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23a2c6" officeooo:paragraph-rsid="0023a2c6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000000" loext:opacity="100%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solid" draw:fill-color="#ffffff"/>
      <style:text-properties fo:font-size="12pt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paragraph-properties fo:text-align="center"/>
      <style:text-properties fo:color="#000000" loext:opacity="100%" fo:font-family="Arial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P8" style:family="paragraph">
      <loext:graphic-properties draw:fill="solid" draw:fill-color="#ffffff"/>
      <style:paragraph-properties fo:text-align="center"/>
      <style:text-properties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text-align="center"/>
      <style:text-properties fo:font-size="9pt" style:font-size-asian="9pt" style:font-size-complex="9pt"/>
    </style:style>
    <style:style style:name="P10" style:family="paragraph">
      <loext:graphic-properties draw:fill="solid" draw:fill-color="#ffffff"/>
      <style:paragraph-properties fo:text-align="center"/>
      <style:text-properties fo:font-family="Arial" style:font-family-generic="swiss" style:font-pitch="variable" fo:font-size="9pt" fo:font-weight="bold" style:font-size-asian="9pt" style:font-weight-asian="bold" style:font-size-complex="9pt" style:font-weight-complex="bold"/>
    </style:style>
    <style:style style:name="P11" style:family="paragraph">
      <loext:graphic-properties draw:fill="solid" draw:fill-color="#ffffff"/>
      <style:paragraph-properties fo:text-align="center"/>
    </style:style>
    <style:style style:name="T1" style:family="text">
      <style:text-properties fo:color="#000000" loext:opacity="100%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loext:opacity="100%" fo:font-family="Arial" style:font-family-generic="swiss" style:font-pitch="variable" fo:font-size="11pt" fo:language="pl" fo:country="PL" fo:font-weight="normal" style:font-size-asian="11pt" style:font-weight-asian="normal" style:font-size-complex="11pt" style:font-weight-complex="normal"/>
    </style:style>
    <style:style style:name="T3" style:family="text">
      <style:text-properties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4" style:family="text">
      <style:text-properties fo:font-family="Arial" style:font-family-generic="swiss" style:font-pitch="variable"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Long_20_Dash_20__28_Rounded_29_" svg:stroke-width="0cm" svg:stroke-color="#000000" svg:stroke-linecap="round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dash" draw:stroke-dash="Double_20_Dash_20_Dot" svg:stroke-color="#000000" draw:fill="solid" draw:fill-color="#ffffff" draw:textarea-horizontal-align="justify" draw:textarea-vertical-align="middle" draw:auto-grow-height="false" fo:min-height="5.001cm" fo:min-width="12cm" style:protect="position siz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212cm" svg:stroke-color="#000000" draw:marker-start-width="0.665cm" draw:marker-end-width="0.665cm" draw:fill="none" draw:textarea-horizontal-align="justify" draw:textarea-vertical-align="middle" draw:auto-grow-height="false" fo:min-height="4.38cm" fo:min-width="10.933cm" fo:padding-top="0.104cm" fo:padding-bottom="0.104cm" fo:padding-left="0.104cm" fo:padding-right="0.10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89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44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101cm" svg:stroke-color="#000000" draw:marker-start-width="0.499cm" draw:marker-end-width="0.499cm" draw:fill="none" draw:textarea-horizontal-align="justify" draw:textarea-vertical-align="middle" draw:auto-grow-height="false" fo:min-height="1.543cm" fo:min-width="2.327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101cm" svg:stroke-color="#000000" draw:marker-start-width="0.499cm" draw:marker-end-width="0.499cm" draw:fill="none" draw:textarea-horizontal-align="justify" draw:textarea-vertical-align="middle" draw:auto-grow-height="false" fo:min-height="1.543cm" fo:min-width="1.827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101cm" svg:stroke-color="#000000" draw:marker-start-width="0.499cm" draw:marker-end-width="0.499cm" draw:fill="none" draw:textarea-horizontal-align="justify" draw:textarea-vertical-align="middle" draw:auto-grow-height="false" fo:min-height="1.589cm" fo:min-width="1.884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solid" draw:fill-color="#ffffff" fo:min-height="1.13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solid" draw:fill-color="#ffffff" fo:min-height="1.1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solid" draw:fill-color="#ffffff" fo:min-height="0.80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width="0.101cm" svg:stroke-color="#000000" draw:marker-start-width="0.499cm" draw:marker-end-width="0.499cm" draw:fill="none" draw:textarea-horizontal-align="justify" draw:textarea-vertical-align="middle" draw:auto-grow-height="false" fo:min-height="0.621cm" fo:min-width="1.219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color="#000000" draw:fill="solid" draw:fill-color="#ffffff" fo:min-height="0.5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width="0cm" svg:stroke-color="#000000" draw:marker-start-width="0.349cm" draw:marker-end-width="0.349cm" draw:fill="solid" draw:fill-color="#ffffff" draw:textarea-horizontal-align="justify" draw:textarea-vertical-align="middle" draw:auto-grow-height="false" fo:min-height="0.531cm" fo:min-width="0.531cm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101cm" svg:stroke-color="#000000" draw:marker-start-width="0.499cm" draw:marker-end-width="0.499cm" draw:fill="none" draw:textarea-horizontal-align="justify" draw:textarea-vertical-align="middle" draw:auto-grow-height="false" fo:min-height="0.667cm" fo:min-width="1.215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color="#000000" draw:fill="solid" draw:fill-color="#ffffff" fo:min-height="0.4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19" draw:name="Linia pozioma 2" draw:style-name="gr1" draw:text-style-name="P2" svg:x1="11.789cm" svg:y1="5.001cm" svg:x2="11.789cm" svg:y2="0cm"><text:p/></draw:line><draw:line text:anchor-type="paragraph" draw:z-index="18" draw:name="Linia pozioma 1" draw:style-name="gr1" draw:text-style-name="P2" svg:x1="0.249cm" svg:y1="5.001cm" svg:x2="0.249cm" svg:y2="0cm"><text:p/></draw:line><draw:frame text:anchor-type="paragraph" draw:z-index="14" draw:name="Kształt 15" draw:style-name="gr2" draw:text-style-name="P4" svg:width="5.023cm" svg:height="1.001cm" svg:x="0.649cm" svg:y="0.27cm"><draw:text-box><text:p text:style-name="P3"><text:span text:style-name="T1">QO-100 transverter</text:span></text:p></draw:text-box></draw:frame><draw:custom-shape text:anchor-type="paragraph" draw:z-index="0" draw:name="Kształt 4" draw:style-name="gr3" draw:text-style-name="P5" svg:width="12.001cm" svg:height="5.001cm" svg:x="0cm" svg:y="0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0" draw:name="Kształt 1" draw:style-name="gr4" draw:text-style-name="P6" svg:width="11.353cm" svg:height="4.8cm" svg:x="0.347cm" svg:y="0.099cm"><text:p/><draw:enhanced-geometry svg:viewBox="0 0 21600 21600" draw:mirror-horizontal="false" draw:mirror-vertical="false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text:s text:c="287"/><draw:frame draw:style-name="fr1" draw:name="Obraz9" text:anchor-type="char" svg:x="6.001cm" svg:y="0.349cm" svg:width="2.602cm" svg:height="2.256cm" draw:z-index="17"><draw:image xlink:href="Pictures/10000001000001FB000001B894071158.png" xlink:type="simple" xlink:show="embed" xlink:actuate="onLoad" draw:mime-type="image/png"/></draw:frame><text:s text:c="20"/><draw:frame draw:style-name="fr1" draw:name="Obraz1 kopia 1" text:anchor-type="char" svg:x="10.199cm" svg:y="0.349cm" svg:width="1.159cm" svg:height="2.452cm" draw:z-index="13"><draw:image xlink:href="Pictures/100000000000037A0000075F3A40A28B.png" xlink:type="simple" xlink:show="embed" xlink:actuate="onLoad" draw:mime-type="image/png"/></draw:frame></text:p>
      <text:p text:style-name="P1"/>
      <text:p text:style-name="P1"/>
      <text:p text:style-name="P1"/>
      <text:p text:style-name="P1"><draw:frame text:anchor-type="paragraph" draw:z-index="1" draw:name="Kształt2_ 2" draw:style-name="gr5" draw:text-style-name="P7" svg:width="2.301cm" svg:height="0.895cm" svg:x="1.198cm" svg:y="0.051cm"><draw:text-box><text:p text:style-name="P3"><text:span text:style-name="T2">28V (13.8V)</text:span></text:p><text:p text:style-name="P3"><text:span text:style-name="T2">1.1A</text:span></text:p></draw:text-box></draw:frame><text:s text:c="172"/></text:p>
      <text:p text:style-name="P1"><draw:frame text:anchor-type="paragraph" draw:z-index="15" draw:name="Kształt2_ 4" draw:style-name="gr6" draw:text-style-name="P7" svg:width="1.502cm" svg:height="0.449cm" svg:x="4.048cm" svg:y="0.014cm"><draw:text-box><text:p text:style-name="P3"><text:span text:style-name="T2">max 5W</text:span></text:p></draw:text-box></draw:frame><text:s text:c="136"/></text:p>
      <text:p text:style-name="P1"><draw:custom-shape text:anchor-type="paragraph" draw:z-index="4" draw:name="Kształt 6" draw:style-name="gr7" draw:text-style-name="P6" svg:width="2.5cm" svg:height="1.717cm" svg:x="1.101cm" svg:y="0.079cm"><text:p/><draw:enhanced-geometry svg:viewBox="0 0 21600 21600" draw:mirror-horizontal="false" draw:mirror-vertical="false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custom-shape text:anchor-type="paragraph" draw:z-index="6" draw:name="Kształt 7" draw:style-name="gr8" draw:text-style-name="P6" svg:width="2.001cm" svg:height="1.717cm" svg:x="3.799cm" svg:y="0.079cm"><text:p/><draw:enhanced-geometry svg:viewBox="0 0 21600 21600" draw:mirror-horizontal="false" draw:mirror-vertical="false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custom-shape text:anchor-type="paragraph" draw:z-index="10" draw:name="Kształt 13" draw:style-name="gr9" draw:text-style-name="P6" svg:width="2.061cm" svg:height="1.766cm" svg:x="8.7cm" svg:y="0.034cm"><text:p/><draw:enhanced-geometry svg:viewBox="0 0 21600 21600" draw:mirror-horizontal="false" draw:mirror-vertical="false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frame text:anchor-type="paragraph" draw:z-index="11" draw:name="Kształt2_ 8" draw:style-name="gr10" draw:text-style-name="P8" svg:width="1.699cm" svg:height="1.138cm" svg:x="8.839cm" svg:y="0.346cm"><draw:text-box><text:p text:style-name="P3"><text:span text:style-name="T3">TX</text:span></text:p><text:p text:style-name="P3"><text:span text:style-name="T3">2.4G</text:span></text:p></draw:text-box></draw:frame><draw:frame text:anchor-type="paragraph" draw:z-index="3" draw:name="Kształt2_ 3" draw:style-name="gr11" draw:text-style-name="P8" svg:width="2.151cm" svg:height="1.151cm" svg:x="1.288cm" svg:y="0.333cm"><draw:text-box><text:p text:style-name="P3"><text:span text:style-name="T3">DC</text:span></text:p><text:p text:style-name="P3"><text:span text:style-name="T3">PTT</text:span></text:p></draw:text-box></draw:frame><draw:frame text:anchor-type="paragraph" draw:z-index="7" draw:name="Kształt2_ 6" draw:style-name="gr12" draw:text-style-name="P10" svg:width="1.401cm" svg:height="0.802cm" svg:x="6.038cm" svg:y="0.083cm"><draw:text-box><text:p text:style-name="P9"><text:span text:style-name="T4">RX ext</text:span></text:p><text:p text:style-name="P9"><text:span text:style-name="T4">ref out</text:span></text:p></draw:text-box></draw:frame><draw:custom-shape text:anchor-type="paragraph" draw:z-index="8" draw:name="Kształt 12" draw:style-name="gr13" draw:text-style-name="P6" svg:width="1.35cm" svg:height="0.752cm" svg:x="6.089cm" svg:y="0.083cm"><text:p/><draw:enhanced-geometry svg:viewBox="0 0 21600 21600" draw:mirror-horizontal="false" draw:mirror-vertical="false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p>
      <text:p text:style-name="P1"><draw:frame text:anchor-type="paragraph" draw:z-index="5" draw:name="Kształt2_ 5" draw:style-name="gr14" draw:text-style-name="P8" svg:width="1.574cm" svg:height="0.571cm" svg:x="4.015cm" svg:y="0.176cm"><draw:text-box><text:p text:style-name="P3"><text:span text:style-name="T3">TRX</text:span></text:p></draw:text-box></draw:frame></text:p>
      <text:p text:style-name="P1"><draw:custom-shape text:anchor-type="paragraph" draw:z-index="2" draw:name="Kształt4_ 9" draw:style-name="gr15" draw:text-style-name="P11" svg:width="0.75cm" svg:height="0.75cm" svg:x="0.101cm" svg:y="0.2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Kształt4_ 6" draw:style-name="gr15" draw:text-style-name="P11" svg:width="0.75cm" svg:height="0.75cm" svg:x="11.139cm" svg:y="0.2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Kształt 14" draw:style-name="gr16" draw:text-style-name="P6" svg:width="1.35cm" svg:height="0.802cm" svg:x="7.089cm" svg:y="0.009cm"><text:p/><draw:enhanced-geometry svg:viewBox="0 0 21600 21600" draw:mirror-horizontal="false" draw:mirror-vertical="false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frame text:anchor-type="paragraph" draw:z-index="9" draw:name="Kształt2_ 7" draw:style-name="gr17" draw:text-style-name="P10" svg:width="0.999cm" svg:height="0.451cm" svg:x="7.239cm" svg:y="0.21cm"><draw:text-box><text:p text:style-name="P9"><text:span text:style-name="T4">LNB</text:span></text:p></draw:text-box></draw:frame></text:p>
      <text:p text:style-name="P1"/>
      <text:p text:style-name="P1"/>
      <text:p text:style-name="P1"><text:s text:c="36"/></text:p>
      <text:p text:style-name="P1"><text:s text:c="79"/></text:p>
      <text:p text:style-name="P1"/>
      <text:p text:style-name="P1"><text:s text:c="80"/></text:p>
      <text:p text:style-name="P1"/>
      <text:p text:style-name="P1"/>
      <text:p text:style-name="P1"/>
      <text:p text:style-name="P1"/>
      <text:p text:style-name="P1"/>
      <text:p text:style-name="P1"/>
      <text:p text:style-name="P1"><text:s text:c="94"/></text:p>
      <text:p text:style-name="P1"/>
      <text:p text:style-name="P1"/>
      <text:p text:style-name="P1"/>
      <text:p text:style-name="P1"/>
      <text:p text:style-name="P1"/>
      <text:p text:style-name="P1"/>
      <text:p text:style-name="P1"><text:s text:c="9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ouble_20_Dash_20_Dot" draw:display-name="Double Dash Dot" draw:style="rect" draw:dots1="1" draw:dots1-length="454%" draw:dots2="1" draw:dots2-length="57%" draw:distance="17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10-29T21:40:13.766000000</meta:creation-date>
    <dc:date>2026-06-16T00:26:39.118134800</dc:date>
    <meta:editing-duration>P3DT12H6M27S</meta:editing-duration>
    <meta:editing-cycles>21</meta:editing-cycles>
    <meta:generator>LibreOffice/25.8.6.2$Windows_X86_64 LibreOffice_project/b4b39682cd9868fa725bc664aff94278d315bd04</meta:generator>
    <meta:print-date>2026-06-16T00:14:56.725926500</meta:print-date>
    <meta:document-statistic meta:table-count="0" meta:image-count="2" meta:object-count="0" meta:page-count="1" meta:paragraph-count="8" meta:word-count="0" meta:character-count="999" meta:non-whitespace-character-count="0"/>
  </office:meta>
</office:document-meta>
</file>