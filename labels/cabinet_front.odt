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7A0000075F3A40A28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3a2c6" officeooo:paragraph-rsid="0023a2c6"/>
    </style:style>
    <style:style style:name="P2" style:family="paragraph">
      <loext:graphic-properties draw:fill="solid" draw:fill-color="#ffffff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000000" loext:opacity="100%" fo:font-family="Arial" style:font-family-generic="swiss" style:font-pitch="variable" fo:font-size="12pt" fo:font-weight="bold" style:font-weight-asian="bold" style:font-weight-complex="bold"/>
    </style:style>
    <style:style style:name="P5" style:family="paragraph">
      <loext:graphic-properties draw:fill="none"/>
    </style:style>
    <style:style style:name="P6" style:family="paragraph">
      <loext:graphic-properties draw:fill="solid" draw:fill-color="#ffffff"/>
      <style:paragraph-properties fo:text-align="center"/>
      <style:text-properties fo:font-family="Arial" style:font-family-generic="swiss" style:font-pitch="variable" fo:font-size="9pt" fo:font-weight="bold" style:font-size-asian="9pt" style:font-weight-asian="bold" style:font-size-complex="9pt" style:font-weight-complex="bold"/>
    </style:style>
    <style:style style:name="P7" style:family="paragraph">
      <style:paragraph-properties fo:text-align="center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fo:font-family="Arial" style:font-family-generic="swiss" style:font-pitch="variable" fo:font-size="7pt" fo:font-weight="bold" style:font-size-asian="7pt" style:font-weight-asian="bold" style:font-size-complex="7pt" style:font-weight-complex="bold"/>
    </style:style>
    <style:style style:name="P9" style:family="paragraph">
      <loext:graphic-properties draw:fill="none" draw:opacity="50%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fo:font-size="12pt"/>
    </style:style>
    <style:style style:name="P12" style:family="paragraph">
      <style:paragraph-properties fo:line-height="100%" fo:text-align="center"/>
    </style:style>
    <style:style style:name="P13" style:family="paragraph">
      <loext:graphic-properties draw:fill="solid" draw:fill-color="#ffffff"/>
      <style:paragraph-properties fo:line-height="100%" fo:text-align="center"/>
      <style:text-properties fo:font-family="Arial" style:font-family-generic="swiss" style:font-pitch="variable" fo:font-size="9pt" fo:font-weight="bold" style:font-size-asian="9pt" style:font-weight-asian="bold" style:font-size-complex="9pt" style:font-weight-complex="bold"/>
    </style:style>
    <style:style style:name="T1" style:family="text">
      <style:text-properties fo:color="#000000" loext:opacity="100%" fo:font-family="Arial" style:font-family-generic="swiss" style:font-pitch="variable" fo:font-size="12pt" fo:font-weight="bold" style:font-weight-asian="bold" style:font-weight-complex="bold"/>
    </style:style>
    <style:style style:name="T2" style:family="text">
      <style:text-properties fo:font-family="Arial" style:font-family-generic="swiss" style:font-pitch="variable" fo:font-size="9pt" fo:font-weight="bold" style:font-size-asian="9pt" style:font-weight-asian="bold" style:font-size-complex="9pt" style:font-weight-complex="bold"/>
    </style:style>
    <style:style style:name="T3" style:family="text">
      <style:text-properties fo:color="#000000" loext:opacity="100%" fo:font-family="Arial" style:font-family-generic="swiss" style:font-pitch="variable" fo:font-size="7pt" fo:language="pl" fo:country="PL" fo:font-weight="normal" style:font-size-asian="7pt" style:font-weight-asian="normal" style:font-size-complex="7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Double_20_Dash_20_Dot" svg:stroke-color="#000000" draw:fill="solid" draw:fill-color="#ffffff" draw:textarea-horizontal-align="justify" draw:textarea-vertical-align="middle" draw:auto-grow-height="false" fo:min-height="4.9cm" fo:min-width="10.5cm" style:protect="position siz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5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101cm" svg:stroke-color="#000000" draw:marker-start-width="0.499cm" draw:marker-end-width="0.499cm" draw:fill="none" draw:textarea-horizontal-align="justify" draw:textarea-vertical-align="middle" draw:auto-grow-height="false" fo:min-height="2.055cm" fo:min-width="1.956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solid" draw:fill-color="#ffffff" fo:min-height="0.47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25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dash" draw:stroke-dash="Dash_20__28_Rounded_29_" svg:stroke-width="0cm" svg:stroke-linecap="round" draw:fill="none" draw:opacity="50%" draw:textarea-horizontal-align="justify" draw:textarea-vertical-align="middle" draw:auto-grow-height="false" fo:min-height="1.58cm" fo:min-width="1.5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svg:stroke-width="0.101cm" svg:stroke-color="#000000" draw:marker-start-width="0.499cm" draw:marker-end-width="0.499cm" draw:fill="none" draw:textarea-horizontal-align="justify" draw:textarea-vertical-align="middle" draw:auto-grow-height="false" fo:min-height="2.058cm" fo:min-width="1.91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solid" draw:fill-color="#ffffff" fo:min-height="0.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cm" svg:stroke-color="#000000" draw:marker-start-width="0.349cm" draw:marker-end-width="0.349cm" draw:fill="solid" draw:fill-color="#ffffff" draw:textarea-horizontal-align="justify" draw:textarea-vertical-align="middle" draw:auto-grow-height="false" fo:min-height="0.46cm" fo:min-width="0.46cm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cm" svg:stroke-color="#000000" draw:marker-start-width="0.349cm" draw:marker-end-width="0.349cm" draw:fill="solid" draw:fill-color="#ffffff" draw:textarea-horizontal-align="justify" draw:textarea-vertical-align="middle" draw:auto-grow-height="false" fo:min-height="0.713cm" fo:min-width="0.713cm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solid" draw:fill-color="#ffffff" fo:min-height="0.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width="0.101cm" svg:stroke-color="#000000" draw:marker-start-width="0.499cm" draw:marker-end-width="0.499cm" draw:fill="none" draw:textarea-horizontal-align="justify" draw:textarea-vertical-align="middle" draw:auto-grow-height="false" fo:min-height="1.099cm" fo:min-width="3.399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101cm" svg:stroke-color="#000000" draw:marker-start-width="0.499cm" draw:marker-end-width="0.499cm" draw:fill="none" draw:textarea-horizontal-align="justify" draw:textarea-vertical-align="middle" draw:auto-grow-height="false" fo:min-height="1.96cm" fo:min-width="1.91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101cm" svg:stroke-color="#000000" draw:marker-start-width="0.499cm" draw:marker-end-width="0.499cm" draw:fill="none" draw:textarea-horizontal-align="justify" draw:textarea-vertical-align="middle" draw:auto-grow-height="false" fo:min-height="1.956cm" fo:min-width="1.956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101cm" svg:stroke-color="#000000" draw:marker-start-width="0.499cm" draw:marker-end-width="0.499cm" draw:fill="none" draw:textarea-horizontal-align="justify" draw:textarea-vertical-align="middle" draw:auto-grow-height="false" fo:min-height="1.145cm" fo:min-width="3.395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Kształt1" draw:style-name="gr1" draw:text-style-name="P2" svg:width="10.501cm" svg:height="4.901cm" svg:x="0cm" svg:y="0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" draw:name="Kształt2" draw:style-name="gr2" draw:text-style-name="P4" svg:width="4.075cm" svg:height="0.571cm" svg:x="5.124cm" svg:y="3.799cm"><draw:text-box><text:p text:style-name="P3"><text:span text:style-name="T1">QO-100 transverter</text:span></text:p></draw:text-box></draw:frame><draw:custom-shape text:anchor-type="paragraph" draw:z-index="2" draw:name="Kształt5" draw:style-name="gr3" draw:text-style-name="P5" svg:width="2.151cm" svg:height="2.25cm" svg:x="6.849cm" svg:y="0.799cm"><text:p/><draw:enhanced-geometry svg:viewBox="0 0 21600 21600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frame text:anchor-type="paragraph" draw:z-index="20" draw:name="Kształt2_0" draw:style-name="gr4" draw:text-style-name="P6" svg:width="1.452cm" svg:height="0.479cm" svg:x="7.198cm" svg:y="0.598cm"><draw:text-box><text:p text:style-name="P3"><text:span text:style-name="T2">TX 2.4G</text:span></text:p></draw:text-box></draw:frame><draw:frame text:anchor-type="paragraph" draw:z-index="3" draw:name="Kształt2_3" draw:style-name="gr5" draw:text-style-name="P8" svg:width="1.366cm" svg:height="0.288cm" svg:x="3.249cm" svg:y="0.198cm"><draw:text-box><text:p text:style-name="P7"><text:span text:style-name="T3">max 5W</text:span></text:p></draw:text-box></draw:frame><draw:custom-shape text:anchor-type="paragraph" draw:z-index="4" draw:name="Kształt 1" draw:style-name="gr6" draw:text-style-name="P9" svg:width="1.751cm" svg:height="1.751cm" svg:x="0.9cm" svg:y="1.1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position-x="$0" draw:handle-position-y="top" draw:handle-switched="true" draw:handle-range-x-minimum="0" draw:handle-range-x-maximum="10800"/></draw:enhanced-geometry></draw:custom-shape><draw:custom-shape text:anchor-type="paragraph" draw:z-index="5" draw:name="Kształt 2" draw:style-name="gr6" draw:text-style-name="P9" svg:width="1.751cm" svg:height="1.751cm" svg:x="3.05cm" svg:y="1.101cm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position-x="$0" draw:handle-position-y="top" draw:handle-switched="true" draw:handle-range-x-minimum="0" draw:handle-range-x-maximum="10800"/></draw:enhanced-geometry></draw:custom-shape><draw:custom-shape text:anchor-type="paragraph" draw:z-index="6" draw:name="Kształt 3" draw:style-name="gr6" draw:text-style-name="P9" svg:width="1.751cm" svg:height="1.751cm" svg:x="7.05cm" svg:y="1.1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position-x="$0" draw:handle-position-y="top" draw:handle-switched="true" draw:handle-range-x-minimum="0" draw:handle-range-x-maximum="10800"/></draw:enhanced-geometry></draw:custom-shape><draw:custom-shape text:anchor-type="paragraph" draw:z-index="7" draw:name="Kształt 4" draw:style-name="gr3" draw:text-style-name="P5" svg:width="2.151cm" svg:height="2.25cm" svg:x="2.849cm" svg:y="0.799cm"><text:p/><draw:enhanced-geometry svg:viewBox="0 0 21600 21600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custom-shape text:anchor-type="paragraph" draw:z-index="8" draw:name="Kształt 5" draw:style-name="gr7" draw:text-style-name="P5" svg:width="2.102cm" svg:height="2.25cm" svg:x="0.748cm" svg:y="0.799cm"><text:p/><draw:enhanced-geometry svg:viewBox="0 0 21600 21600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frame text:anchor-type="paragraph" draw:z-index="18" draw:name="Kształt2_ 1" draw:style-name="gr8" draw:text-style-name="P6" svg:width="1.153cm" svg:height="0.401cm" svg:x="3.348cm" svg:y="0.598cm"><draw:text-box><text:p text:style-name="P3"><text:span text:style-name="T2"><text:s/>TRX </text:span></text:p></draw:text-box></draw:frame><draw:frame text:anchor-type="paragraph" draw:z-index="16" draw:name="Kształt2_ 2" draw:style-name="gr8" draw:text-style-name="P6" svg:width="1.251cm" svg:height="0.401cm" svg:x="1.148cm" svg:y="0.598cm"><draw:text-box><text:p text:style-name="P3"><text:span text:style-name="T2">LNB</text:span></text:p></draw:text-box></draw:frame><draw:custom-shape text:anchor-type="paragraph" draw:z-index="9" draw:name="Kształt4_ 1" draw:style-name="gr9" draw:text-style-name="P10" svg:width="0.652cm" svg:height="0.652cm" svg:x="0.3cm" svg:y="0.1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Kształt4_ 2" draw:style-name="gr9" draw:text-style-name="P10" svg:width="0.652cm" svg:height="0.652cm" svg:x="9.601cm" svg:y="0.1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Kształt4_ 3" draw:style-name="gr9" draw:text-style-name="P10" svg:width="0.652cm" svg:height="0.652cm" svg:x="9.599cm" svg:y="4.1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Kształt4_ 4" draw:style-name="gr9" draw:text-style-name="P10" svg:width="0.652cm" svg:height="0.652cm" svg:x="0.298cm" svg:y="4.1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Kształt4_ 5" draw:style-name="gr10" draw:text-style-name="P11" svg:width="1.006cm" svg:height="1.006cm" svg:x="1.249cm" svg:y="3.39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2" draw:name="Kształt2_ 3" draw:style-name="gr11" draw:text-style-name="P13" svg:width="1.401cm" svg:height="0.9cm" svg:x="2.699cm" svg:y="3.099cm"><draw:text-box><text:p text:style-name="P12"><text:span text:style-name="T2">RX ext</text:span></text:p><text:p text:style-name="P12"><text:span text:style-name="T2">ref out</text:span></text:p></draw:text-box></draw:frame><draw:custom-shape text:anchor-type="paragraph" draw:z-index="14" draw:name="Kształt 6" draw:style-name="gr12" draw:text-style-name="P5" svg:width="3.551cm" svg:height="1.251cm" svg:x="1.099cm" svg:y="3.298cm"><text:p/><draw:enhanced-geometry svg:viewBox="0 0 21600 21600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custom-shape text:anchor-type="paragraph" draw:z-index="15" draw:name="Kształt 7" draw:style-name="gr13" draw:text-style-name="P5" svg:width="2.102cm" svg:height="2.151cm" svg:x="0.748cm" svg:y="0.898cm"><text:p/><draw:enhanced-geometry svg:viewBox="0 0 21600 21600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custom-shape text:anchor-type="paragraph" draw:z-index="17" draw:name="Kształt 8" draw:style-name="gr14" draw:text-style-name="P5" svg:width="2.151cm" svg:height="2.151cm" svg:x="2.849cm" svg:y="0.898cm"><text:p/><draw:enhanced-geometry svg:viewBox="0 0 21600 21600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custom-shape text:anchor-type="paragraph" draw:z-index="19" draw:name="Kształt 9" draw:style-name="gr14" draw:text-style-name="P5" svg:width="2.151cm" svg:height="2.151cm" svg:x="6.849cm" svg:y="0.898cm"><text:p/><draw:enhanced-geometry svg:viewBox="0 0 21600 21600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custom-shape text:anchor-type="paragraph" draw:z-index="21" draw:name="Kształt 10" draw:style-name="gr15" draw:text-style-name="P5" svg:width="3.551cm" svg:height="1.301cm" svg:x="1.099cm" svg:y="3.249cm"><text:p/><draw:enhanced-geometry svg:viewBox="0 0 21600 21600" draw:path-stretchpoint-x="10800" draw:path-stretchpoint-y="10800" draw:text-areas="?f3 ?f4 ?f5 ?f6" draw:type="round-rectangle" draw:modifiers="1645.8530006743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\<draw:frame draw:style-name="fr1" draw:name="Obraz1" text:anchor-type="char" svg:x="5.256cm" svg:y="0.499cm" svg:width="1.344cm" svg:height="2.847cm" draw:z-index="23"><draw:image xlink:href="Pictures/100000000000037A0000075F3A40A28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_20__28_Rounded_29_" draw:display-name="Dash (Rounded)" draw:style="round" draw:dots1="1" draw:dots1-length="201%" draw:distance="199%"/>
    <draw:stroke-dash draw:name="Double_20_Dash_20_Dot" draw:display-name="Double Dash Dot" draw:style="rect" draw:dots1="1" draw:dots1-length="454%" draw:dots2="1" draw:dots2-length="57%" draw:distance="17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10-29T21:40:13.766000000</meta:creation-date>
    <dc:date>2026-06-11T18:10:41.921990200</dc:date>
    <meta:editing-duration>P3DT6M39S</meta:editing-duration>
    <meta:editing-cycles>14</meta:editing-cycles>
    <meta:generator>LibreOffice/25.8.5.2$Windows_X86_64 LibreOffice_project/9c8b85f387cc00a89945a79c9e6239f32e450ac2</meta:generator>
    <meta:print-date>2026-06-08T20:05:08.323443300</meta:print-date>
    <meta:document-statistic meta:table-count="0" meta:image-count="1" meta:object-count="0" meta:page-count="1" meta:paragraph-count="1" meta:word-count="1" meta:character-count="1" meta:non-whitespace-character-count="1"/>
  </office:meta>
</office:document-meta>
</file>