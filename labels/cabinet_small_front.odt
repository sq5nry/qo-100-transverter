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1F000002B3A2F7BFF0.png" manifest:media-type="image/png"/>
  <manifest:file-entry manifest:full-path="Pictures/100000000000037A0000075F3A40A2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a2c6" officeooo:paragraph-rsid="0023a2c6"/>
    </style:style>
    <style:style style:name="P2" style:family="paragraph">
      <loext:graphic-properties draw:fill="solid" draw:fill-color="#ffffff"/>
      <style:text-properties fo:font-size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</style:style>
    <style:style style:name="P9" style:family="paragraph" style:parent-style-name="Standard">
      <style:paragraph-properties fo:text-align="left" style:justify-single-word="false"/>
      <style:text-properties officeooo:rsid="0023a2c6" officeooo:paragraph-rsid="0023a2c6"/>
    </style:style>
    <style:style style:name="P10" style:family="paragraph">
      <style:paragraph-properties fo:text-align="left"/>
    </style:style>
    <style:style style:name="P11" style:family="paragraph">
      <loext:graphic-properties draw:fill="none" draw:fill-color="#ffffff"/>
      <style:paragraph-properties fo:text-align="left"/>
      <style:text-properties fo:color="#000000" loext:opacity="100%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fo:font-size="12pt"/>
    </style:style>
    <style:style style:name="P13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opacity="50%"/>
      <style:paragraph-properties style:writing-mode="lr-tb"/>
    </style:style>
    <style:style style:name="P15" style:family="paragraph">
      <style:paragraph-properties fo:line-height="100%" fo:text-align="center"/>
      <style:text-properties fo:font-size="8pt" style:font-size-asian="8pt" style:font-size-complex="8pt"/>
    </style:style>
    <style:style style:name="P16" style:family="paragraph">
      <loext:graphic-properties draw:fill="solid" draw:fill-color="#ffffff"/>
      <style:paragraph-properties fo:line-height="100%" fo:text-align="center"/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ffffff"/>
      <style:paragraph-properties fo:text-align="center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loext:opacity="100%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0000" loext:opacity="100%" fo:font-family="Arial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loext:opacity="100%" fo:font-family="Arial" style:font-family-generic="swiss" style:font-pitch="variable" fo:font-size="7pt" fo:language="pl" fo:country="PL" fo:font-weight="normal" style:font-size-asian="7pt" style:font-weight-asian="normal" style:font-size-complex="7pt" style:font-weight-complex="normal"/>
    </style:style>
    <style:style style:name="T5" style:family="text"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uble_20_Dash_20_Dot" svg:stroke-color="#000000" draw:fill="solid" draw:fill-color="#ffffff" draw:textarea-horizontal-align="justify" draw:textarea-vertical-align="middle" draw:auto-grow-height="false" fo:min-height="3.401cm" fo:min-width="10.5cm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ff" fo:min-height="0.47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0.46cm" fo:min-width="0.46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438cm" fo:min-width="1.2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489cm" fo:min-width="1.2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388cm" fo:min-width="1.2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439cm" fo:min-width="1.2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1.886cm" loext:decorative="false" style:run-through="foreground"/>
      <style:paragraph-properties style:writing-mode="lr-tb"/>
    </style:style>
    <style:style style:name="gr11" style:family="graphic">
      <style:graphic-properties svg:stroke-width="0.018cm" svg:stroke-color="#000000" draw:marker-start-width="0.374cm" draw:marker-end-width="0.374cm" draw:fill="none" draw:textarea-horizontal-align="justify" draw:textarea-vertical-align="middle" draw:auto-grow-height="false" fo:min-height="1.801cm" fo:min-width="3.253cm" fo:padding-top="0.007cm" fo:padding-bottom="0.007cm" fo:padding-left="0.007cm" fo:padding-right="0.007cm" loext:decorative="false" style:run-through="foreground"/>
    </style:style>
    <style:style style:name="gr12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2.108cm" fo:min-width="1.95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2.207cm" fo:min-width="1.95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0.672cm" fo:min-width="0.672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0.887cm" fo:min-width="0.887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28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8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8cm" svg:stroke-color="#000000" draw:marker-start-width="0.374cm" draw:marker-end-width="0.374cm" draw:fill="none" draw:textarea-horizontal-align="justify" draw:textarea-vertical-align="middle" draw:auto-grow-height="false" fo:min-height="1.801cm" fo:min-width="3.253cm" fo:padding-top="0.007cm" fo:padding-bottom="0.007cm" fo:padding-left="0.007cm" fo:padding-right="0.0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288cm" fo:min-width="1.48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solid" draw:fill-color="#ffffff" fo:min-he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dash" draw:stroke-dash="Dash_20__28_Rounded_29_" svg:stroke-width="0cm" svg:stroke-linecap="round" draw:fill="none" draw:opacity="50%" draw:textarea-horizontal-align="justify" draw:textarea-vertical-align="middle" draw:auto-grow-height="false" fo:min-height="1.632cm" fo:min-width="1.5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191cm" fo:min-width="1.4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solid" draw:fill-color="#ffffff" fo:min-height="0.6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1.274cm" fo:min-width="1.274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dash" draw:stroke-dash="Dash_20__28_Rounded_29_" svg:stroke-width="0cm" svg:stroke-linecap="round" draw:fill="none" draw:opacity="50%" draw:textarea-horizontal-align="justify" draw:textarea-vertical-align="middle" draw:auto-grow-height="false" fo:min-height="1.806cm" fo:min-width="1.80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5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solid" draw:fill-color="#ffffff" fo:min-height="1.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Kształt1" draw:style-name="gr1" draw:text-style-name="P2" svg:width="10.501cm" svg:height="3.402cm" svg:x="0cm" svg:y="0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" draw:name="Kształt2" draw:style-name="gr2" draw:text-style-name="P4" svg:width="4.075cm" svg:height="0.571cm" svg:x="5.726cm" svg:y="0.079cm"><draw:text-box><text:p text:style-name="P3"><text:span text:style-name="T1">QO-100 transverter</text:span></text:p></draw:text-box></draw:frame><draw:frame text:anchor-type="paragraph" draw:z-index="18" draw:name="Kształt2_0" draw:style-name="gr3" draw:text-style-name="P6" svg:width="1.452cm" svg:height="0.479cm" svg:x="7.198cm" svg:y="0.598cm"><draw:text-box><text:p text:style-name="P5"><text:span text:style-name="T2">TX 2.4G</text:span></text:p></draw:text-box></draw:frame><draw:custom-shape text:anchor-type="paragraph" draw:z-index="7" draw:name="Kształt4_ 1" draw:style-name="gr4" draw:text-style-name="P7" svg:width="0.652cm" svg:height="0.652cm" svg:x="0.3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Kształt4_ 2" draw:style-name="gr4" draw:text-style-name="P7" svg:width="0.652cm" svg:height="0.652cm" svg:x="9.601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Kształt 5" draw:style-name="gr5" draw:text-style-name="P8" svg:width="1.451cm" svg:height="1.601cm" svg:x="1cm" svg:y="0.349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13" draw:name="Kształt 7" draw:style-name="gr6" draw:text-style-name="P8" svg:width="1.451cm" svg:height="1.652cm" svg:x="1cm" svg:y="0.349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12" draw:name="Kształt 6" draw:style-name="gr7" draw:text-style-name="P8" svg:width="1.451cm" svg:height="1.551cm" svg:x="4.399cm" svg:y="0.399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19" draw:name="Kształt 10" draw:style-name="gr8" draw:text-style-name="P8" svg:width="1.451cm" svg:height="1.602cm" svg:x="4.399cm" svg:y="0.399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\ <text:s text:c="105"/></text:p>
      <text:p text:style-name="P9"><draw:g text:anchor-type="paragraph" draw:z-index="34" draw:name="DrawObject2" draw:style-name="gr9"><draw:frame draw:name="Kształt 11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12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37" draw:name="DrawObject 1" draw:style-name="gr9"><draw:frame draw:name="Kształt 13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14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40" draw:name="DrawObject 2" draw:style-name="gr9"><draw:frame draw:name="Kształt 17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18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43" draw:name="DrawObject 3" draw:style-name="gr9"><draw:frame draw:name="Kształt 23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24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46" draw:name="DrawObject 4" draw:style-name="gr9"><draw:frame draw:name="Kształt 27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28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49" draw:name="DrawObject 5" draw:style-name="gr9"><draw:frame draw:name="Kształt 31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32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52" draw:name="DrawObject 6" draw:style-name="gr9"><draw:frame draw:name="Kształt 35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36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55" draw:name="DrawObject 7" draw:style-name="gr9"><draw:frame draw:name="Kształt 39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40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custom-shape text:anchor-type="paragraph" draw:z-index="17" draw:name="Kształt 9" draw:style-name="gr12" draw:text-style-name="P8" svg:width="2.151cm" svg:height="2.303cm" svg:x="6.849cm" svg:y="0.411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2" draw:name="Kształt5" draw:style-name="gr13" draw:text-style-name="P8" svg:width="2.151cm" svg:height="2.401cm" svg:x="6.849cm" svg:y="0.312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9" draw:name="Kształt4_ 3" draw:style-name="gr4" draw:text-style-name="P7" svg:width="0.652cm" svg:height="0.652cm" svg:x="9.599cm" svg:y="2.1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Kształt4_ 4" draw:style-name="gr4" draw:text-style-name="P7" svg:width="0.652cm" svg:height="0.652cm" svg:x="0.298cm" svg:y="2.1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Kształt4_ 7" draw:style-name="gr14" draw:text-style-name="P12" svg:width="0.952cm" svg:height="0.952cm" svg:x="4.65cm" svg:y="0.1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Kształt4_ 5" draw:style-name="gr15" draw:text-style-name="P12" svg:width="1.251cm" svg:height="1.251cm" svg:x="1.099cm" svg:y="0.0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name="Kształt2_3" draw:style-name="gr16" draw:text-style-name="P13" svg:width="1.366cm" svg:height="0.288cm" svg:x="2.75cm" svg:y="0.275cm"><draw:text-box><text:p text:style-name="P5"><text:span text:style-name="T4">max 5W</text:span></text:p></draw:text-box></draw:frame><draw:frame text:anchor-type="paragraph" draw:z-index="35" draw:name="Kształt 19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36" draw:name="Kształt 20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38" draw:name="Kształt 15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39" draw:name="Kształt 16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41" draw:name="Kształt 21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42" draw:name="Kształt 22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44" draw:name="Kształt 25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45" draw:name="Kształt 26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47" draw:name="Kształt 29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48" draw:name="Kształt 30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50" draw:name="Kształt 33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51" draw:name="Kształt 34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53" draw:name="Kształt 37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54" draw:name="Kształt 38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56" draw:name="Kształt 41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57" draw:name="Kształt 42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 text:c="100"/><draw:frame draw:style-name="fr1" draw:name="Obraz1" text:anchor-type="char" svg:x="9.273cm" svg:y="0.362cm" svg:width="0.829cm" svg:height="1.753cm" draw:z-index="21"><draw:image xlink:href="Pictures/100000000000037A0000075F3A40A28B.png" xlink:type="simple" xlink:show="embed" xlink:actuate="onLoad" draw:mime-type="image/png"/></draw:frame></text:p>
      <text:p text:style-name="P9"><draw:custom-shape text:anchor-type="paragraph" draw:z-index="15" draw:name="Kształt 8" draw:style-name="gr19" draw:text-style-name="P8" svg:width="1.65cm" svg:height="1.451cm" svg:x="2.6cm" svg:y="0.425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16" draw:name="Kształt2_ 1" draw:style-name="gr20" draw:text-style-name="P6" svg:width="0.853cm" svg:height="0.401cm" svg:x="2.997cm" svg:y="0.226cm"><draw:text-box><text:p text:style-name="P5"><text:span text:style-name="T2"><text:s/>TRX </text:span></text:p></draw:text-box></draw:frame><draw:custom-shape text:anchor-type="paragraph" draw:z-index="4" draw:name="Kształt 3" draw:style-name="gr21" draw:text-style-name="P14" svg:width="1.751cm" svg:height="1.802cm" svg:x="7.05cm" svg:y="0.275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p>
      <text:p text:style-name="P9"><draw:custom-shape text:anchor-type="paragraph" draw:z-index="5" draw:name="Kształt 4" draw:style-name="gr22" draw:text-style-name="P8" svg:width="1.65cm" svg:height="1.35cm" svg:x="2.6cm" svg:y="0.039cm"><text:p/><draw:enhanced-geometry svg:viewBox="0 0 21600 21600" draw:path-stretchpoint-x="10800" draw:path-stretchpoint-y="10800" draw:text-areas="?f3 ?f4 ?f5 ?f6" draw:mirror-horizontal="false" draw:mirror-vertical="false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22" draw:name="Kształt4_ 6" draw:style-name="gr14" draw:text-style-name="P12" svg:width="0.952cm" svg:height="0.952cm" svg:x="2.949cm" svg:y="0.23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Kształt2_ 2" draw:style-name="gr20" draw:text-style-name="P6" svg:width="0.851cm" svg:height="0.401cm" svg:x="1.3cm" svg:y="0.339cm"><draw:text-box><text:p text:style-name="P5"><text:span text:style-name="T2">LNB</text:span></text:p></draw:text-box></draw:frame><draw:frame text:anchor-type="paragraph" draw:z-index="20" draw:name="Kształt2_ 3" draw:style-name="gr23" draw:text-style-name="P16" svg:width="1.05cm" svg:height="0.699cm" svg:x="4.6cm" svg:y="0.291cm"><draw:text-box><text:p text:style-name="P15"><text:span text:style-name="T5">RX ext</text:span></text:p><text:p text:style-name="P15"><text:span text:style-name="T5">ref out</text:span></text:p></draw:text-box></draw:frame></text:p>
      <text:p text:style-name="P9"/>
      <text:p text:style-name="P9"/>
      <text:p text:style-name="P9"/>
      <text:p text:style-name="P9"><text:s text:c="140"/></text:p>
      <text:p text:style-name="P9"><draw:g text:anchor-type="paragraph" draw:z-index="58" draw:name="DrawObject 8" draw:style-name="gr9"><draw:frame draw:name="Kształt 43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44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61" draw:name="DrawObject 9" draw:style-name="gr9"><draw:frame draw:name="Kształt 47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48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64" draw:name="DrawObject 10" draw:style-name="gr9"><draw:frame draw:name="Kształt 51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52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67" draw:name="DrawObject 11" draw:style-name="gr9"><draw:frame draw:name="Kształt 55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56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70" draw:name="DrawObject 12" draw:style-name="gr9"><draw:frame draw:name="Kształt 59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60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73" draw:name="DrawObject 13" draw:style-name="gr9"><draw:frame draw:name="Kształt 63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64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76" draw:name="DrawObject 14" draw:style-name="gr9"><draw:frame draw:name="Kształt 67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68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g text:anchor-type="paragraph" draw:z-index="79" draw:name="DrawObject 15" draw:style-name="gr9"><draw:frame draw:name="Kształt 71" draw:style-name="gr10" draw:text-style-name="P11" svg:width="3.052cm" svg:height="1.886cm" svg:x="11.601cm" svg:y="0.477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draw:name="Kształt 72" draw:style-name="gr11" draw:text-style-name="P8" svg:width="3.352cm" svg:height="1.9cm" svg:x="11.451cm" svg:y="0.376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draw:g><draw:custom-shape text:anchor-type="paragraph" draw:z-index="24" draw:name="Kształt 1" draw:style-name="gr1" draw:text-style-name="P2" svg:width="10.501cm" svg:height="3.402cm" svg:x="0cm" svg:y="0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" draw:name="Kształt4_ 8" draw:style-name="gr4" draw:text-style-name="P7" svg:width="0.652cm" svg:height="0.652cm" svg:x="0.3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Kształt4_ 9" draw:style-name="gr4" draw:text-style-name="P7" svg:width="0.652cm" svg:height="0.652cm" svg:x="9.601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Kształt4_ 12" draw:style-name="gr24" draw:text-style-name="P12" svg:width="1.8cm" svg:height="1.8cm" svg:x="3.551cm" svg:y="0.2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Kształt 2" draw:style-name="gr25" draw:text-style-name="P14" svg:width="2.001cm" svg:height="2.001cm" svg:x="3.45cm" svg:y="0.106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59" draw:name="Kształt 45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60" draw:name="Kształt 46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62" draw:name="Kształt 49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63" draw:name="Kształt 50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65" draw:name="Kształt 53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66" draw:name="Kształt 54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68" draw:name="Kształt 57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69" draw:name="Kształt 58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71" draw:name="Kształt 61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72" draw:name="Kształt 62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74" draw:name="Kształt 65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75" draw:name="Kształt 66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77" draw:name="Kształt 69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78" draw:name="Kształt 70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80" draw:name="Kształt 73" draw:style-name="gr17" draw:text-style-name="P11" svg:width="3.052cm" svg:height="1.886cm" svg:x="15.101cm" svg:y="0.459cm"><draw:text-box><text:p text:style-name="P10"><text:span text:style-name="T3">rev 0.2 </text:span><text:span text:style-name="T1"><text:s/></text:span><text:span text:style-name="T3">SQ5NRY</text:span></text:p><text:p text:style-name="P10"><text:span text:style-name="T3">S/N:</text:span></text:p><text:p text:style-name="P10"><text:span text:style-name="T3"/></text:p><text:p text:style-name="P10"><text:span text:style-name="T1">Made in Poland</text:span></text:p></draw:text-box></draw:frame><draw:custom-shape text:anchor-type="paragraph" draw:z-index="81" draw:name="Kształt 74" draw:style-name="gr18" draw:text-style-name="P8" svg:width="3.352cm" svg:height="1.9cm" svg:x="14.951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 text:c="19"/><draw:frame draw:style-name="fr1" draw:name="Obraz10" text:anchor-type="char" svg:x="5.764cm" svg:y="0.155cm" svg:width="3.588cm" svg:height="3.103cm" draw:z-index="32"><draw:image xlink:href="Pictures/100000010000031F000002B3A2F7BFF0.png" xlink:type="simple" xlink:show="embed" xlink:actuate="onLoad" draw:mime-type="image/png"/></draw:frame></text:p>
      <text:p text:style-name="P9"><draw:custom-shape text:anchor-type="paragraph" draw:z-index="27" draw:name="Kształt4_ 10" draw:style-name="gr4" draw:text-style-name="P7" svg:width="0.652cm" svg:height="0.652cm" svg:x="9.599cm" svg:y="2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Kształt4_ 11" draw:style-name="gr4" draw:text-style-name="P7" svg:width="0.652cm" svg:height="0.652cm" svg:x="0.298cm" svg:y="2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9" draw:name="Kształt2_ 4" draw:style-name="gr26" draw:text-style-name="P13" svg:width="1.816cm" svg:height="0.588cm" svg:x="1.799cm" svg:y="0.318cm"><draw:text-box><text:p text:style-name="P5"><text:span text:style-name="T4">28V (13.8V)</text:span></text:p><text:p text:style-name="P5"><text:span text:style-name="T4">1.1A</text:span></text:p></draw:text-box></draw:frame><text:s text:c="108"/></text:p>
      <text:p text:style-name="P9"/>
      <text:p text:style-name="P9"/>
      <text:p text:style-name="P9"><draw:frame text:anchor-type="paragraph" draw:z-index="31" draw:name="Kształt2_ 5" draw:style-name="gr27" draw:text-style-name="P17" svg:width="2.251cm" svg:height="1.151cm" svg:x="3.298cm" svg:y="0.159cm"><draw:text-box><text:p text:style-name="P5"><text:span text:style-name="T6">DC</text:span></text:p><text:p text:style-name="P5"><text:span text:style-name="T6">PTT</text:span></text:p></draw:text-box></draw:frame></text:p>
      <text:p text:style-name="P9"/>
      <text:p text:style-name="P9"/>
      <text:p text:style-name="P9"><text:s text:c="139"/></text:p>
      <text:p text:style-name="P9"><text:s text:c="18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draw:stroke-dash draw:name="Double_20_Dash_20_Dot" draw:display-name="Double Dash Dot" draw:style="rect" draw:dots1="1" draw:dots1-length="454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29T21:40:13.766000000</meta:creation-date>
    <dc:date>2026-07-07T17:48:22.872922100</dc:date>
    <meta:editing-duration>P3DT29M12S</meta:editing-duration>
    <meta:editing-cycles>15</meta:editing-cycles>
    <meta:generator>LibreOffice/26.2.4.2$Windows_X86_64 LibreOffice_project/0229ac93fcf0d7cbc6376066c6f35021cef002dc</meta:generator>
    <meta:print-date>2026-07-07T17:23:10.316981600</meta:print-date>
    <meta:document-statistic meta:table-count="0" meta:image-count="2" meta:object-count="0" meta:page-count="1" meta:paragraph-count="7" meta:word-count="1" meta:character-count="795" meta:non-whitespace-character-count="1"/>
  </office:meta>
</office:document-meta>
</file>