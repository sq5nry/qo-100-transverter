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B000001B894071158.png" manifest:media-type="image/png"/>
  <manifest:file-entry manifest:full-path="Pictures/100000000000037A0000075F3A40A28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3a2c6" officeooo:paragraph-rsid="0023a2c6"/>
    </style:style>
    <style:style style:name="P2" style:family="paragraph">
      <loext:graphic-properties draw:fill="solid" draw:fill-color="#ffffff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/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fo:font-family="Arial" style:font-family-generic="swiss" style:font-pitch="variable" fo:font-size="11pt" fo:language="pl" fo:country="PL" fo:font-weight="normal" style:font-size-asian="11pt" style:font-weight-asian="normal" style:font-size-complex="11pt" style:font-weight-complex="normal"/>
    </style:style>
    <style:style style:name="T3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uble_20_Dash_20_Dot" svg:stroke-color="#000000" draw:fill="solid" draw:fill-color="#ffffff" draw:textarea-horizontal-align="justify" draw:textarea-vertical-align="middle" draw:auto-grow-height="false" fo:min-height="5.001cm" fo:min-width="14.499cm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Long_20_Dash_20__28_Rounded_29_" svg:stroke-width="0cm" svg:stroke-color="#000000" svg:stroke-linecap="round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337cm" fo:min-width="1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solid" draw:fill-color="#ffffff" fo:min-height="1.2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337cm" fo:min-width="2.33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337cm" fo:min-width="1.63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solid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ffffff" fo:min-height="0.9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ffffff" fo:min-height="0.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ffffff" fo:min-height="1.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0.531cm" fo:min-width="0.531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31"/></text:p>
      <text:p text:style-name="P1"><draw:custom-shape text:anchor-type="paragraph" draw:z-index="0" draw:name="Kształt 4" draw:style-name="gr1" draw:text-style-name="P2" svg:width="14.5cm" svg:height="5.001cm" svg:x="0cm" svg:y="0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4" draw:name="Kształt 15" draw:style-name="gr2" draw:text-style-name="P4" svg:width="5.023cm" svg:height="1.001cm" svg:x="0.649cm" svg:y="0.27cm"><draw:text-box><text:p text:style-name="P3"><text:span text:style-name="T1">QO-100 transverter</text:span></text:p></draw:text-box></draw:frame><draw:line text:anchor-type="paragraph" draw:z-index="18" draw:name="Linia pozioma 1" draw:style-name="gr3" draw:text-style-name="P5" svg:x1="0.249cm" svg:y1="5.001cm" svg:x2="0.249cm" svg:y2="0cm"><text:p/></draw:line><draw:line text:anchor-type="paragraph" draw:z-index="19" draw:name="Linia pozioma 2" draw:style-name="gr3" draw:text-style-name="P5" svg:x1="14.25cm" svg:y1="5.001cm" svg:x2="14.25cm" svg:y2="0cm"><text:p/></draw:line><text:s text:c="74"/><draw:frame draw:style-name="fr1" draw:name="Obraz9" text:anchor-type="char" svg:x="6.899cm" svg:y="0.22cm" svg:width="3.193cm" svg:height="2.771cm" draw:z-index="17"><draw:image xlink:href="Pictures/10000001000001FB000001B894071158.png" xlink:type="simple" xlink:show="embed" xlink:actuate="onLoad" draw:mime-type="image/png"/></draw:frame><text:s text:c="2"/><draw:frame draw:style-name="fr1" draw:name="Obraz1 kopia 1" text:anchor-type="char" svg:x="12cm" svg:y="0.175cm" svg:width="1.344cm" svg:height="2.847cm" draw:z-index="13"><draw:image xlink:href="Pictures/100000000000037A0000075F3A40A28B.png" xlink:type="simple" xlink:show="embed" xlink:actuate="onLoad" draw:mime-type="image/png"/></draw:frame></text:p>
      <text:p text:style-name="P1"/>
      <text:p text:style-name="P1"/>
      <text:p text:style-name="P1"/>
      <text:p text:style-name="P1"><draw:frame text:anchor-type="paragraph" draw:z-index="1" draw:name="Kształt2_ 2" draw:style-name="gr4" draw:text-style-name="P6" svg:width="2.301cm" svg:height="0.895cm" svg:x="1.099cm" svg:y="0.273cm"><draw:text-box><text:p text:style-name="P3"><text:span text:style-name="T2">28V (13.8V)</text:span></text:p><text:p text:style-name="P3"><text:span text:style-name="T2">1.1A</text:span></text:p></draw:text-box></draw:frame><text:s text:c="172"/></text:p>
      <text:p text:style-name="P1"><draw:frame text:anchor-type="paragraph" draw:z-index="15" draw:name="Kształt2_ 4" draw:style-name="gr5" draw:text-style-name="P6" svg:width="1.502cm" svg:height="0.449cm" svg:x="4.048cm" svg:y="0.236cm"><draw:text-box><text:p text:style-name="P3"><text:span text:style-name="T2">max 5W</text:span></text:p></draw:text-box></draw:frame></text:p>
      <text:p text:style-name="P1"><draw:custom-shape text:anchor-type="paragraph" draw:z-index="8" draw:name="Kształt 12" draw:style-name="gr6" draw:text-style-name="P7" svg:width="2.001cm" svg:height="1.5cm" svg:x="6.301cm" svg:y="0.3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7" draw:name="Kształt2_ 6" draw:style-name="gr7" draw:text-style-name="P8" svg:width="1.802cm" svg:height="1.251cm" svg:x="6.421cm" svg:y="0.45cm"><draw:text-box><text:p text:style-name="P3"><text:span text:style-name="T3">RX ext</text:span></text:p><text:p text:style-name="P3"><text:span text:style-name="T3">ref out</text:span></text:p></draw:text-box></draw:frame><draw:custom-shape text:anchor-type="paragraph" draw:z-index="4" draw:name="Kształt 6" draw:style-name="gr8" draw:text-style-name="P7" svg:width="2.5cm" svg:height="1.5cm" svg:x="1cm" svg:y="0.3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6" draw:name="Kształt 7" draw:style-name="gr6" draw:text-style-name="P7" svg:width="2.001cm" svg:height="1.5cm" svg:x="3.851cm" svg:y="0.3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10" draw:name="Kształt 13" draw:style-name="gr9" draw:text-style-name="P7" svg:width="1.8cm" svg:height="1.5cm" svg:x="8.7cm" svg:y="0.3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11" draw:name="Kształt2_ 8" draw:style-name="gr10" draw:text-style-name="P8" svg:width="1.95cm" svg:height="1.138cm" svg:x="11.072cm" svg:y="0.46cm"><draw:text-box><text:p text:style-name="P3"><text:span text:style-name="T3">TX</text:span></text:p><text:p text:style-name="P3"><text:span text:style-name="T3">2.4G</text:span></text:p></draw:text-box></draw:frame><draw:custom-shape text:anchor-type="paragraph" draw:z-index="12" draw:name="Kształt 14" draw:style-name="gr8" draw:text-style-name="P7" svg:width="2.5cm" svg:height="1.5cm" svg:x="10.8cm" svg:y="0.3cm"><text:p/><draw:enhanced-geometry svg:viewBox="0 0 21600 21600" draw:mirror-horizontal="false" draw:mirror-vertical="false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p>
      <text:p text:style-name="P1"><draw:frame text:anchor-type="paragraph" draw:z-index="5" draw:name="Kształt2_ 5" draw:style-name="gr11" draw:text-style-name="P8" svg:width="1.574cm" svg:height="0.93cm" svg:x="4.048cm" svg:y="0.263cm"><draw:text-box><text:p text:style-name="P3"><text:span text:style-name="T3">TRX</text:span></text:p></draw:text-box></draw:frame><draw:frame text:anchor-type="paragraph" draw:z-index="9" draw:name="Kształt2_ 7" draw:style-name="gr12" draw:text-style-name="P8" svg:width="1.172cm" svg:height="0.971cm" svg:x="8.999cm" svg:y="0.263cm"><draw:text-box><text:p text:style-name="P3"><text:span text:style-name="T3">LNB</text:span></text:p></draw:text-box></draw:frame><draw:frame text:anchor-type="paragraph" draw:z-index="3" draw:name="Kształt2_ 3" draw:style-name="gr13" draw:text-style-name="P8" svg:width="2.251cm" svg:height="1.151cm" svg:x="1.12cm" svg:y="0.012cm"><draw:text-box><text:p text:style-name="P3"><text:span text:style-name="T3">DC</text:span></text:p><text:p text:style-name="P3"><text:span text:style-name="T3">PTT</text:span></text:p></draw:text-box></draw:frame></text:p>
      <text:p text:style-name="P1"><draw:custom-shape text:anchor-type="paragraph" draw:z-index="2" draw:name="Kształt4_ 9" draw:style-name="gr14" draw:text-style-name="P9" svg:width="0.75cm" svg:height="0.75cm" svg:x="0.101cm" svg:y="0.2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Kształt4_ 6" draw:style-name="gr14" draw:text-style-name="P9" svg:width="0.75cm" svg:height="0.75cm" svg:x="13.651cm" svg:y="0.2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text:s text:c="36"/></text:p>
      <text:p text:style-name="P1"/>
      <text:p text:style-name="P1"/>
      <text:p text:style-name="P1"><text:s text:c="4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9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uble_20_Dash_20_Dot" draw:display-name="Double Dash Dot" draw:style="rect" draw:dots1="1" draw:dots1-length="454%" draw:dots2="1" draw:dots2-length="57%" draw:distance="17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29T21:40:13.766000000</meta:creation-date>
    <dc:date>2026-06-21T15:33:22.559835100</dc:date>
    <meta:editing-duration>P3DT11H54M53S</meta:editing-duration>
    <meta:editing-cycles>20</meta:editing-cycles>
    <meta:generator>LibreOffice/25.8.7.3$Windows_X86_64 LibreOffice_project/30742500f2d3eb4366ac312fa33d3dcabdb3eba5</meta:generator>
    <meta:print-date>2026-06-12T16:47:05.248893100</meta:print-date>
    <meta:document-statistic meta:table-count="0" meta:image-count="2" meta:object-count="0" meta:page-count="1" meta:paragraph-count="6" meta:word-count="0" meta:character-count="651" meta:non-whitespace-character-count="0"/>
  </office:meta>
</office:document-meta>
</file>