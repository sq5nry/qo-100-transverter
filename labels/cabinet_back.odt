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1460000013B2BCB88F4.png" manifest:media-type="image/png"/>
  <manifest:file-entry manifest:full-path="Pictures/20000009000009EC000009960E927D70.svm" manifest:media-type="image/x-svm"/>
  <manifest:file-entry manifest:full-path="Pictures/100000010000031F000002B31689ECF6.png" manifest:media-type="image/png"/>
  <manifest:file-entry manifest:full-path="Pictures/10000000000001460000013BB991BAF7.png" manifest:media-type="image/png"/>
  <manifest:file-entry manifest:full-path="Pictures/10000000000001460000013B71E8216B.png" manifest:media-type="image/png"/>
  <manifest:file-entry manifest:full-path="Pictures/10000000000001460000013B934D6877.png" manifest:media-type="image/png"/>
  <manifest:file-entry manifest:full-path="Pictures/10000000000001460000013BC96EC1E8.png" manifest:media-type="image/png"/>
  <manifest:file-entry manifest:full-path="Pictures/10000000000001460000013B5B34F3EB.png" manifest:media-type="image/png"/>
  <manifest:file-entry manifest:full-path="Pictures/10000000000001460000013BE3B21368.png" manifest:media-type="image/png"/>
  <manifest:file-entry manifest:full-path="Pictures/10000000000001460000013B01175A74.png" manifest:media-type="image/png"/>
  <manifest:file-entry manifest:full-path="Pictures/10000001000001FB000001B894071158.png" manifest:media-type="image/png"/>
  <manifest:file-entry manifest:full-path="Pictures/100000000000037A0000075F3A40A28B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23a2c6" officeooo:paragraph-rsid="0023a2c6"/>
    </style:style>
    <style:style style:name="P2" style:family="paragraph">
      <style:paragraph-properties fo:text-align="start"/>
      <style:text-properties fo:font-size="11pt" style:font-size-asian="11pt" style:font-size-complex="11pt"/>
    </style:style>
    <style:style style:name="P3" style:family="paragraph">
      <loext:graphic-properties draw:fill="none" draw:fill-color="#ffffff"/>
      <style:paragraph-properties fo:text-align="start"/>
      <style:text-properties fo:color="#000000" loext:opacity="100%" fo:font-family="Arial" style:font-family-generic="swiss" style:font-pitch="variable" fo:font-size="11pt" fo:font-weight="bold" style:font-size-asian="11pt" style:font-weight-asian="bold" style:font-size-complex="11pt" style:font-weight-complex="bold"/>
    </style:style>
    <style:style style:name="P4" style:family="paragraph">
      <loext:graphic-properties draw:fill="none"/>
    </style:style>
    <style:style style:name="P5" style:family="paragraph">
      <loext:graphic-properties draw:fill="solid" draw:fill-color="#ffffff"/>
      <style:text-properties fo:font-size="12pt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ffffff"/>
      <style:paragraph-properties fo:text-align="center"/>
      <style:text-properties fo:font-family="Arial" style:font-family-generic="swiss" style:font-pitch="variable" fo:font-size="9pt" fo:font-weight="bold" style:font-size-asian="9pt" style:font-weight-asian="bold" style:font-size-complex="9pt" style:font-weight-complex="bold"/>
    </style:style>
    <style:style style:name="P8" style:family="paragraph">
      <loext:graphic-properties draw:fill="none" draw:fill-color="#ffffff"/>
      <style:paragraph-properties fo:text-align="center"/>
      <style:text-properties fo:color="#000000" loext:opacity="100%" fo:font-family="Arial" style:font-family-generic="swiss" style:font-pitch="variable" fo:font-size="7pt" fo:font-weight="bold" style:font-size-asian="7pt" style:font-weight-asian="bold" style:font-size-complex="7pt" style:font-weight-complex="bold"/>
    </style:style>
    <style:style style:name="P9" style:family="paragraph">
      <loext:graphic-properties draw:fill="solid" draw:fill-color="#ffffff" draw:opacity="100%"/>
      <style:paragraph-properties fo:text-align="center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loext:graphic-properties draw:fill="solid" draw:fill-color="#ffffff"/>
      <style:paragraph-properties fo:text-align="center"/>
      <style:text-properties fo:font-size="12pt"/>
    </style:style>
    <style:style style:name="P12" style:family="paragraph">
      <loext:graphic-properties draw:fill-color="#ffffff"/>
    </style:style>
    <style:style style:name="P13" style:family="paragraph" style:parent-style-name="Standard">
      <style:paragraph-properties fo:text-align="start" style:justify-single-word="false"/>
      <style:text-properties officeooo:rsid="0023a2c6" officeooo:paragraph-rsid="0023a2c6"/>
    </style:style>
    <style:style style:name="P14" style:family="paragraph">
      <style:paragraph-properties fo:margin-top="0.201cm" fo:margin-bottom="0.201cm"/>
      <style:text-properties fo:font-family="Arial" style:font-family-generic="swiss" style:font-pitch="variable"/>
    </style:style>
    <style:style style:name="P15" style:family="paragraph">
      <loext:graphic-properties draw:fill="none" draw:fill-color="#ffffff"/>
      <style:paragraph-properties fo:margin-top="0.201cm" fo:margin-bottom="0.201cm"/>
      <style:text-properties fo:font-family="Arial" style:font-family-generic="swiss" style:font-pitch="variable"/>
    </style:style>
    <style:style style:name="P16" style:family="paragraph" style:parent-style-name="Standard">
      <style:paragraph-properties fo:text-align="start" style:justify-single-word="false"/>
      <style:text-properties officeooo:rsid="004e594d" officeooo:paragraph-rsid="004e594d"/>
    </style:style>
    <style:style style:name="P17" style:family="paragraph">
      <loext:graphic-properties draw:fill="none" draw:fill-color="#ffffff"/>
      <style:paragraph-properties fo:text-align="center"/>
      <style:text-properties fo:color="#000000" loext:opacity="100%" fo:font-family="Arial" style:font-family-generic="swiss" style:font-pitch="variable" fo:font-size="12pt" fo:font-weight="bold" style:font-weight-asian="bold" style:font-weight-complex="bold"/>
    </style:style>
    <style:style style:name="P18" style:family="paragraph">
      <style:paragraph-properties fo:text-align="center"/>
      <style:text-properties fo:font-size="14pt" style:font-size-asian="14pt" style:font-size-complex="14pt"/>
    </style:style>
    <style:style style:name="P19" style:family="paragraph">
      <loext:graphic-properties draw:fill="none" draw:fill-color="#ffffff"/>
      <style:paragraph-properties fo:text-align="center"/>
      <style:text-properties fo:color="#000000" loext:opacity="100%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P20" style:family="paragraph">
      <loext:graphic-properties draw:fill-color="#000000"/>
      <style:paragraph-properties fo:text-align="center"/>
    </style:style>
    <style:style style:name="P21" style:family="paragraph">
      <style:paragraph-properties fo:text-align="center"/>
      <style:text-properties fo:font-size="11pt" style:font-size-asian="11pt" style:font-size-complex="11pt"/>
    </style:style>
    <style:style style:name="P22" style:family="paragraph">
      <loext:graphic-properties draw:fill="none" draw:fill-color="#ffffff"/>
      <style:paragraph-properties fo:text-align="center"/>
      <style:text-properties fo:color="#000000" loext:opacity="100%" fo:font-family="Arial" style:font-family-generic="swiss" style:font-pitch="variable" fo:font-size="11pt" fo:font-weight="bold" style:font-size-asian="11pt" style:font-weight-asian="bold" style:font-size-complex="11pt" style:font-weight-complex="bold"/>
    </style:style>
    <style:style style:name="P23" style:family="paragraph">
      <loext:graphic-properties draw:fill="solid" draw:fill-color="#ffffff"/>
      <style:paragraph-properties fo:text-align="center"/>
      <style:text-properties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000000" loext:opacity="100%" fo:font-family="Arial" style:font-family-generic="swiss" style:font-pitch="variable" fo:font-size="11pt" fo:font-weight="normal" style:font-size-asian="11pt" style:font-weight-asian="normal" style:font-size-complex="11pt" style:font-weight-complex="normal"/>
    </style:style>
    <style:style style:name="T2" style:family="text">
      <style:text-properties fo:color="#000000" loext:opacity="100%" fo:font-family="Arial" style:font-family-generic="swiss" style:font-pitch="variable" fo:font-size="11pt" fo:font-weight="bold" style:font-size-asian="11pt" style:font-weight-asian="bold" style:font-size-complex="11pt" style:font-weight-complex="bold"/>
    </style:style>
    <style:style style:name="T3" style:family="text">
      <style:text-properties fo:font-family="Arial" style:font-family-generic="swiss" style:font-pitch="variable" fo:font-size="9pt" fo:font-weight="bold" style:font-size-asian="9pt" style:font-weight-asian="bold" style:font-size-complex="9pt" style:font-weight-complex="bold"/>
    </style:style>
    <style:style style:name="T4" style:family="text">
      <style:text-properties fo:color="#000000" loext:opacity="100%" fo:font-family="Arial" style:font-family-generic="swiss" style:font-pitch="variable" fo:font-size="7pt" fo:language="pl" fo:country="PL" fo:font-weight="normal" style:font-size-asian="7pt" style:font-weight-asian="normal" style:font-size-complex="7pt" style:font-weight-complex="normal"/>
    </style:style>
    <style:style style:name="T5" style:family="text">
      <style:text-properties fo:font-family="Arial" style:font-family-generic="swiss" style:font-pitch="variable"/>
    </style:style>
    <style:style style:name="T6" style:family="text">
      <style:text-properties fo:color="#000000" loext:opacity="100%" fo:font-family="Arial" style:font-family-generic="swiss" style:font-pitch="variable" fo:font-size="12pt"/>
    </style:style>
    <style:style style:name="T7" style:family="text">
      <style:text-properties fo:color="#000000" loext:opacity="100%" fo:font-family="Arial" style:font-family-generic="swiss" style:font-pitch="variable" fo:font-size="12pt" fo:font-weight="normal" style:font-weight-asian="normal" style:font-weight-complex="normal"/>
    </style:style>
    <style:style style:name="T8" style:family="text">
      <style:text-properties fo:color="#000000" loext:opacity="100%" fo:font-family="Arial" style:font-family-generic="swiss" style:font-pitch="variable" fo:font-size="12pt" fo:font-weight="bold" style:font-weight-asian="bold" style:font-weight-complex="bold"/>
    </style:style>
    <style:style style:name="T9" style:family="text">
      <style:text-properties fo:color="#000000" loext:opacity="100%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10" style:family="text">
      <style:text-properties fo:color="#000000" loext:opacity="100%" fo:font-family="Arial" style:font-family-generic="swiss" style:font-pitch="variable" fo:font-size="11pt" fo:language="pl" fo:country="PL" fo:font-weight="normal" style:font-size-asian="11pt" style:font-weight-asian="normal" style:font-size-complex="11pt" style:font-weight-complex="normal"/>
    </style:style>
    <style:style style:name="T11" style:family="text">
      <style:text-properties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writing-mode="lr-tb" loext:decorative="false" style:run-through="foreground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1.886cm" loext:decorative="false" style:run-through="foreground"/>
      <style:paragraph-properties style:writing-mode="lr-tb"/>
    </style:style>
    <style:style style:name="gr3" style:family="graphic">
      <style:graphic-properties svg:stroke-width="0.018cm" svg:stroke-color="#000000" draw:marker-start-width="0.374cm" draw:marker-end-width="0.374cm" draw:fill="none" draw:textarea-horizontal-align="justify" draw:textarea-vertical-align="middle" draw:auto-grow-height="false" fo:min-height="1.801cm" fo:min-width="3.253cm" fo:padding-top="0.007cm" fo:padding-bottom="0.007cm" fo:padding-left="0.007cm" fo:padding-right="0.007cm" loext:decorative="false" style:run-through="foreground"/>
    </style:style>
    <style:style style:name="gr4" style:family="graphic">
      <style:graphic-properties draw:stroke="dash" draw:stroke-dash="Double_20_Dash_20_Dot" svg:stroke-color="#000000" draw:fill="solid" draw:fill-color="#ffffff" draw:textarea-horizontal-align="justify" draw:textarea-vertical-align="middle" draw:auto-grow-height="false" fo:min-height="4.9cm" fo:min-width="10.5cm" style:protect="position siz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101cm" svg:stroke-color="#000000" draw:marker-start-width="0.499cm" draw:marker-end-width="0.499cm" draw:fill="none" draw:textarea-horizontal-align="justify" draw:textarea-vertical-align="middle" draw:auto-grow-height="false" fo:min-height="2.057cm" fo:min-width="2.006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000000" draw:fill="solid" draw:fill-color="#ffffff" fo:min-height="0.47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58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svg:stroke-width="0cm" svg:stroke-color="#000000" draw:marker-start-width="0.349cm" draw:marker-end-width="0.349cm" draw:fill="solid" draw:fill-color="#ffffff" draw:opacity="100%" draw:textarea-horizontal-align="justify" draw:textarea-vertical-align="middle" draw:auto-grow-height="false" fo:min-height="0.46cm" fo:min-width="0.46cm" fo:padding-top="0cm" fo:padding-bottom="0cm" fo:padding-left="0cm" fo:padding-right="0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width="0cm" svg:stroke-color="#000000" draw:marker-start-width="0.349cm" draw:marker-end-width="0.349cm" draw:fill="solid" draw:fill-color="#ffffff" draw:textarea-horizontal-align="justify" draw:textarea-vertical-align="middle" draw:auto-grow-height="false" fo:min-height="0.46cm" fo:min-width="0.46cm" fo:padding-top="0cm" fo:padding-bottom="0cm" fo:padding-left="0cm" fo:padding-right="0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width="0cm" svg:stroke-color="#000000" draw:marker-start-width="0.349cm" draw:marker-end-width="0.349cm" draw:fill="solid" draw:fill-color="#ffffff" draw:textarea-horizontal-align="justify" draw:textarea-vertical-align="middle" draw:auto-grow-height="false" fo:min-height="1.274cm" fo:min-width="1.274cm" fo:padding-top="0cm" fo:padding-bottom="0cm" fo:padding-left="0cm" fo:padding-right="0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svg:stroke-width="0.101cm" svg:stroke-color="#000000" draw:marker-start-width="0.499cm" draw:marker-end-width="0.499cm" draw:fill="none" draw:textarea-horizontal-align="justify" draw:textarea-vertical-align="middle" draw:auto-grow-height="false" fo:min-height="2.155cm" fo:min-width="2.006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svg:stroke-color="#000000" draw:fill="none" draw:fill-color="#ffffff" fo:min-height="1.88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svg:stroke-width="0.018cm" svg:stroke-color="#000000" draw:marker-start-width="0.374cm" draw:marker-end-width="0.374cm" draw:fill="none" draw:textarea-horizontal-align="justify" draw:textarea-vertical-align="middle" draw:auto-grow-height="false" fo:min-height="1.801cm" fo:min-width="3.253cm" fo:padding-top="0.007cm" fo:padding-bottom="0.007cm" fo:padding-left="0.007cm" fo:padding-right="0.00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svg:stroke-width="0.101cm" svg:stroke-color="#000000" draw:marker-start-width="0.499cm" draw:marker-end-width="0.499cm" draw:fill="none" draw:textarea-horizontal-align="justify" draw:textarea-vertical-align="middle" draw:auto-grow-height="false" fo:min-height="2.771cm" fo:min-width="3.42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svg:stroke-color="#000000" draw:fill="solid" draw:fill-color="#ffffff" fo:min-height="0.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svg:stroke-color="#ffffff" draw:fill-color="#ffffff" draw:textarea-horizontal-align="justify" draw:textarea-vertical-align="middle" draw:auto-grow-height="false" fo:min-height="3.45cm" fo:min-width="4.276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stroke="none" draw:fill="none" draw:fill-color="#ffffff" fo:min-height="2.812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8" style:family="graphic">
      <style:graphic-properties draw:stroke="none" svg:stroke-color="#000000" draw:fill="none" draw:fill-color="#ffffff" fo:min-height="0.5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none" svg:stroke-color="#000000" draw:fill="none" draw:fill-color="#ffffff" fo:min-height="0.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stroke="dash" draw:stroke-dash="Double_20_Dash_20_Dot" svg:stroke-color="#000000" draw:fill="solid" draw:fill-color="#ffffff" draw:textarea-horizontal-align="justify" draw:textarea-vertical-align="middle" draw:auto-grow-height="false" fo:min-height="5.001cm" fo:min-width="14.499cm" style:protect="position siz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draw:stroke="none" svg:stroke-color="#000000" draw:fill="none" draw:fill-color="#ffffff" fo:min-height="1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stroke="dash" draw:stroke-dash="Long_20_Dash_20__28_Rounded_29_" svg:stroke-width="0cm" svg:stroke-color="#000000" svg:stroke-linecap="round" draw:fill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3" style:family="graphic">
      <style:graphic-properties draw:stroke="none" svg:stroke-color="#000000" draw:fill="none" draw:fill-color="#ffffff" fo:min-height="0.8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draw:stroke="none" svg:stroke-color="#000000" draw:fill="none" draw:fill-color="#ffffff" fo:min-height="0.44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svg:stroke-width="0.101cm" svg:stroke-color="#000000" draw:marker-start-width="0.499cm" draw:marker-end-width="0.499cm" draw:fill="none" draw:textarea-horizontal-align="justify" draw:textarea-vertical-align="middle" draw:auto-grow-height="false" fo:min-height="1.337cm" fo:min-width="1.838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6" style:family="graphic">
      <style:graphic-properties draw:stroke="none" svg:stroke-color="#000000" draw:fill="solid" draw:fill-color="#ffffff" fo:min-height="1.251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7" style:family="graphic">
      <style:graphic-properties svg:stroke-width="0.101cm" svg:stroke-color="#000000" draw:marker-start-width="0.499cm" draw:marker-end-width="0.499cm" draw:fill="none" draw:textarea-horizontal-align="justify" draw:textarea-vertical-align="middle" draw:auto-grow-height="false" fo:min-height="1.337cm" fo:min-width="2.337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8" style:family="graphic">
      <style:graphic-properties svg:stroke-width="0.101cm" svg:stroke-color="#000000" draw:marker-start-width="0.499cm" draw:marker-end-width="0.499cm" draw:fill="none" draw:textarea-horizontal-align="justify" draw:textarea-vertical-align="middle" draw:auto-grow-height="false" fo:min-height="1.337cm" fo:min-width="1.637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9" style:family="graphic">
      <style:graphic-properties draw:stroke="none" svg:stroke-color="#000000" draw:fill="solid" draw:fill-color="#ffffff" fo:min-height="1.13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0" style:family="graphic">
      <style:graphic-properties draw:stroke="none" svg:stroke-color="#000000" draw:fill="solid" draw:fill-color="#ffffff" fo:min-height="0.9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1" style:family="graphic">
      <style:graphic-properties draw:stroke="none" svg:stroke-color="#000000" draw:fill="solid" draw:fill-color="#ffffff" fo:min-height="0.9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2" style:family="graphic">
      <style:graphic-properties draw:stroke="none" svg:stroke-color="#000000" draw:fill="solid" draw:fill-color="#ffffff" fo:min-height="1.1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3" style:family="graphic">
      <style:graphic-properties svg:stroke-width="0cm" svg:stroke-color="#000000" draw:marker-start-width="0.349cm" draw:marker-end-width="0.349cm" draw:fill="solid" draw:fill-color="#ffffff" draw:textarea-horizontal-align="justify" draw:textarea-vertical-align="middle" draw:auto-grow-height="false" fo:min-height="0.531cm" fo:min-width="0.531cm" fo:padding-top="0cm" fo:padding-bottom="0cm" fo:padding-left="0cm" fo:padding-right="0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g text:anchor-type="paragraph" draw:z-index="48" draw:name="DrawObject1" draw:style-name="gr1"><draw:frame draw:name="Kształt 11" draw:style-name="gr2" draw:text-style-name="P3" svg:width="3.052cm" svg:height="1.886cm" svg:x="11.55cm" svg:y="0.113cm"><draw:text-box><text:p text:style-name="P2"><text:span text:style-name="T1">rev 0.2 </text:span><text:span text:style-name="T2"><text:s/></text:span><text:span text:style-name="T1">SQ5NRY</text:span></text:p><text:p text:style-name="P2"><text:span text:style-name="T1">S/N:</text:span></text:p><text:p text:style-name="P2"><text:span text:style-name="T1"/></text:p><text:p text:style-name="P2"><text:span text:style-name="T2">Made in Poland</text:span></text:p></draw:text-box></draw:frame><draw:custom-shape draw:name="Kształt 16" draw:style-name="gr3" draw:text-style-name="P4" svg:width="3.352cm" svg:height="1.9cm" svg:x="11.4cm" svg:y="0.012cm"><text:p/><draw:enhanced-geometry svg:viewBox="0 0 21600 21600" draw:path-stretchpoint-x="10800" draw:path-stretchpoint-y="10800" draw:text-areas="?f3 ?f4 ?f5 ?f6" draw:mirror-horizontal="false" draw:mirror-vertical="false" draw:type="round-rectangle" draw:modifiers="1645.85300067431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/draw:g><draw:custom-shape text:anchor-type="paragraph" draw:z-index="0" draw:name="Kształt1" draw:style-name="gr4" draw:text-style-name="P5" svg:width="10.501cm" svg:height="4.901cm" svg:x="0cm" svg:y="0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" draw:name="Kształt5" draw:style-name="gr5" draw:text-style-name="P4" svg:width="2.2cm" svg:height="2.251cm" svg:x="5.249cm" svg:y="1.348cm"><text:p/><draw:enhanced-geometry svg:viewBox="0 0 21600 21600" draw:path-stretchpoint-x="10800" draw:path-stretchpoint-y="10800" draw:text-areas="?f3 ?f4 ?f5 ?f6" draw:type="round-rectangle" draw:modifiers="1645.85300067431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draw:frame text:anchor-type="paragraph" draw:z-index="8" draw:name="Kształt2_0" draw:style-name="gr6" draw:text-style-name="P7" svg:width="1.452cm" svg:height="0.479cm" svg:x="5.648cm" svg:y="1.071cm"><draw:text-box><text:p text:style-name="P6"><text:span text:style-name="T3">DC+PTT</text:span></text:p></draw:text-box></draw:frame><draw:frame text:anchor-type="paragraph" draw:z-index="2" draw:name="Kształt2_3" draw:style-name="gr7" draw:text-style-name="P8" svg:width="1.816cm" svg:height="0.588cm" svg:x="5.435cm" svg:y="0.31cm"><draw:text-box><text:p text:style-name="P6"><text:span text:style-name="T4">28V (13.8V)</text:span></text:p><text:p text:style-name="P6"><text:span text:style-name="T4">1.1A</text:span></text:p></draw:text-box></draw:frame><draw:custom-shape text:anchor-type="paragraph" draw:z-index="46" draw:name="Kształt4_ 1" draw:style-name="gr8" draw:text-style-name="P9" svg:width="0.652cm" svg:height="0.652cm" svg:x="0.3cm" svg:y="0.10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Kształt4_ 2" draw:style-name="gr9" draw:text-style-name="P10" svg:width="0.652cm" svg:height="0.652cm" svg:x="9.601cm" svg:y="0.10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Kształt4_ 3" draw:style-name="gr9" draw:text-style-name="P10" svg:width="0.652cm" svg:height="0.652cm" svg:x="9.599cm" svg:y="4.14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Kształt4_ 4" draw:style-name="gr9" draw:text-style-name="P10" svg:width="0.652cm" svg:height="0.652cm" svg:x="0.298cm" svg:y="4.14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name="Kształt4_ 5" draw:style-name="gr10" draw:text-style-name="P11" svg:width="1.8cm" svg:height="1.8cm" svg:x="5.45cm" svg:y="1.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name="Kształt 9" draw:style-name="gr11" draw:text-style-name="P4" svg:width="2.2cm" svg:height="2.35cm" svg:x="5.249cm" svg:y="1.249cm"><text:p/><draw:enhanced-geometry svg:viewBox="0 0 21600 21600" draw:path-stretchpoint-x="10800" draw:path-stretchpoint-y="10800" draw:text-areas="?f3 ?f4 ?f5 ?f6" draw:type="round-rectangle" draw:modifiers="1645.85300067431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draw:frame text:anchor-type="paragraph" draw:z-index="49" draw:name="Kształt 17" draw:style-name="gr12" draw:text-style-name="P3" svg:width="3.052cm" svg:height="1.886cm" svg:x="15.05cm" svg:y="0.113cm"><draw:text-box><text:p text:style-name="P2"><text:span text:style-name="T1">rev 0.2 </text:span><text:span text:style-name="T2"><text:s/></text:span><text:span text:style-name="T1">SQ5NRY</text:span></text:p><text:p text:style-name="P2"><text:span text:style-name="T1">S/N:</text:span></text:p><text:p text:style-name="P2"><text:span text:style-name="T1"/></text:p><text:p text:style-name="P2"><text:span text:style-name="T2">Made in Poland</text:span></text:p></draw:text-box></draw:frame><draw:custom-shape text:anchor-type="paragraph" draw:z-index="50" draw:name="Kształt 18" draw:style-name="gr13" draw:text-style-name="P4" svg:width="3.352cm" svg:height="1.9cm" svg:x="14.9cm" svg:y="0.012cm"><text:p/><draw:enhanced-geometry svg:viewBox="0 0 21600 21600" draw:path-stretchpoint-x="10800" draw:path-stretchpoint-y="10800" draw:text-areas="?f3 ?f4 ?f5 ?f6" draw:mirror-horizontal="false" draw:mirror-vertical="false" draw:type="round-rectangle" draw:modifiers="1645.85300067431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\</text:p>
      <text:p text:style-name="P1"><draw:custom-shape text:anchor-type="paragraph" draw:z-index="19" draw:name="Kształt 1" draw:style-name="gr14" draw:text-style-name="P4" svg:width="3.65cm" svg:height="3.001cm" svg:x="0.549cm" svg:y="0.362cm"><text:p/><draw:enhanced-geometry svg:viewBox="0 0 21600 21600" draw:path-stretchpoint-x="10800" draw:path-stretchpoint-y="10800" draw:text-areas="?f3 ?f4 ?f5 ?f6" draw:mirror-horizontal="false" draw:mirror-vertical="false" draw:type="round-rectangle" draw:modifiers="1645.85300067431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draw:frame text:anchor-type="paragraph" draw:z-index="20" draw:name="Kształt2_ 1" draw:style-name="gr15" draw:text-style-name="P7" svg:width="1.052cm" svg:height="0.401cm" svg:x="1.847cm" svg:y="0.111cm"><draw:text-box><text:p text:style-name="P6"><text:span text:style-name="T3">IF</text:span></text:p></draw:text-box></draw:frame><draw:custom-shape text:anchor-type="paragraph" draw:z-index="44" draw:name="Kształt 10" draw:style-name="gr16" draw:text-style-name="P12" svg:width="4.276cm" svg:height="3.451cm" svg:x="0.3cm" svg:y="0.012cm"><text:p/><draw:enhanced-geometry svg:viewBox="0 0 21600 21600" draw:type="rectangle" draw:enhanced-path="M 0 0 L 21600 0 21600 21600 0 21600 0 0 Z N"/></draw:custom-shape><draw:frame draw:style-name="fr1" draw:name="Obraz10" text:anchor-type="char" svg:x="1.02cm" svg:y="0.139cm" svg:width="3.588cm" svg:height="3.103cm" draw:z-index="45"><draw:image xlink:href="Pictures/100000010000031F000002B31689ECF6.png" xlink:type="simple" xlink:show="embed" xlink:actuate="onLoad" draw:mime-type="image/png"/></draw:frame></text:p>
      <text:p text:style-name="P13"><draw:frame text:anchor-type="paragraph" draw:z-index="17" draw:name="Ramka tekstowa 1" draw:style-name="gr17" draw:text-style-name="P15" svg:width="0.562cm" svg:height="2.812cm" svg:x="1.538cm" svg:y="0.113cm"><draw:text-box><text:p text:style-name="P14"><text:span text:style-name="T5">29</text:span></text:p><text:p text:style-name="P14"><text:span text:style-name="T5">50</text:span></text:p><text:p text:style-name="P14"><text:span text:style-name="T5">51</text:span></text:p><text:p text:style-name="P14"><text:span text:style-name="T5">70</text:span></text:p></draw:text-box></draw:frame><draw:frame text:anchor-type="paragraph" draw:z-index="18" draw:name="Ramka tekstowa 2" draw:style-name="gr17" draw:text-style-name="P15" svg:width="1.061cm" svg:height="2.812cm" svg:x="3.089cm" svg:y="0.113cm"><draw:text-box><text:p text:style-name="P14"><text:span text:style-name="T5">144</text:span></text:p><text:p text:style-name="P14"><text:span text:style-name="T5">145</text:span></text:p><text:p text:style-name="P14"><text:span text:style-name="T5">432</text:span></text:p><text:p text:style-name="P14"><text:span text:style-name="T5">1296</text:span></text:p></draw:text-box></draw:frame><draw:frame draw:style-name="fr1" draw:name="Obraz1" text:anchor-type="char" svg:x="0.75cm" svg:y="0.757cm" svg:width="0.6cm" svg:height="0.57cm" draw:z-index="10"><draw:image xlink:href="Pictures/10000000000001460000013BB991BAF7.png" xlink:type="simple" xlink:show="embed" xlink:actuate="onLoad" draw:mime-type="image/png"/></draw:frame><draw:frame draw:style-name="fr1" draw:name="Obraz4" text:anchor-type="char" svg:x="0.75cm" svg:y="1.431cm" svg:width="0.6cm" svg:height="0.57cm" draw:z-index="12"><draw:image xlink:href="Pictures/10000000000001460000013B934D6877.png" xlink:type="simple" xlink:show="embed" xlink:actuate="onLoad" draw:mime-type="image/png"/></draw:frame><draw:frame draw:style-name="fr1" draw:name="Obraz7" text:anchor-type="char" svg:x="0.75cm" svg:y="2.157cm" svg:width="0.6cm" svg:height="0.57cm" draw:z-index="14"><draw:image xlink:href="Pictures/10000000000001460000013B71E8216B.png" xlink:type="simple" xlink:show="embed" xlink:actuate="onLoad" draw:mime-type="image/png"/></draw:frame><draw:frame draw:style-name="fr1" draw:name="Obraz8" text:anchor-type="char" svg:x="2.351cm" svg:y="0.056cm" svg:width="0.6cm" svg:height="0.57cm" draw:z-index="15"><draw:image xlink:href="Pictures/10000000000001460000013B2BCB88F4.png" xlink:type="simple" xlink:show="embed" xlink:actuate="onLoad" draw:mime-type="image/png"/></draw:frame><draw:frame draw:style-name="fr1" draw:name="Obraz6" text:anchor-type="char" svg:x="2.351cm" svg:y="0.757cm" svg:width="0.6cm" svg:height="0.57cm" draw:z-index="13"><draw:image xlink:href="Pictures/10000000000001460000013BC96EC1E8.png" xlink:type="simple" xlink:show="embed" xlink:actuate="onLoad" draw:mime-type="image/png"/></draw:frame><draw:frame draw:style-name="fr1" draw:name="Obraz3" text:anchor-type="char" svg:x="2.35cm" svg:y="1.431cm" svg:width="0.6cm" svg:height="0.57cm" draw:z-index="11"><draw:image xlink:href="Pictures/10000000000001460000013BE3B21368.png" xlink:type="simple" xlink:show="embed" xlink:actuate="onLoad" draw:mime-type="image/png"/></draw:frame><draw:frame draw:style-name="fr1" draw:name="Obraz5" text:anchor-type="char" svg:x="2.35cm" svg:y="2.131cm" svg:width="0.6cm" svg:height="0.57cm" draw:z-index="16"><draw:image xlink:href="Pictures/10000000000001460000013B01175A74.png" xlink:type="simple" xlink:show="embed" xlink:actuate="onLoad" draw:mime-type="image/png"/></draw:frame><draw:frame draw:style-name="fr1" draw:name="Obraz2" text:anchor-type="char" svg:x="0.75cm" svg:y="0.056cm" svg:width="0.6cm" svg:height="0.57cm" draw:z-index="9"><draw:image xlink:href="Pictures/10000000000001460000013B5B34F3EB.png" xlink:type="simple" xlink:show="embed" xlink:actuate="onLoad" draw:mime-type="image/png"/></draw:frame></text:p>
      <text:p text:style-name="P16">S <text:s text:c="148"/></text:p>
      <text:p text:style-name="P13"/>
      <text:p text:style-name="P13"><draw:g text:anchor-type="paragraph" draw:z-index="41" draw:name="DrawObject2" draw:style-name="gr1"><draw:frame draw:name="Kształt 5" draw:style-name="gr2" draw:text-style-name="P3" svg:width="3.052cm" svg:height="1.886cm" svg:x="11.55cm" svg:y="0.579cm"><draw:text-box><text:p text:style-name="P2"><text:span text:style-name="T1">rev 0.2 </text:span><text:span text:style-name="T2"><text:s/></text:span><text:span text:style-name="T1">SQ5NRY</text:span></text:p><text:p text:style-name="P2"><text:span text:style-name="T1">S/N:</text:span></text:p><text:p text:style-name="P2"><text:span text:style-name="T1"/></text:p><text:p text:style-name="P2"><text:span text:style-name="T2">Made in Poland</text:span></text:p></draw:text-box></draw:frame><draw:custom-shape draw:name="Kształt 8" draw:style-name="gr3" draw:text-style-name="P4" svg:width="3.352cm" svg:height="1.9cm" svg:x="11.4cm" svg:y="0.478cm"><text:p/><draw:enhanced-geometry svg:viewBox="0 0 21600 21600" draw:path-stretchpoint-x="10800" draw:path-stretchpoint-y="10800" draw:text-areas="?f3 ?f4 ?f5 ?f6" draw:mirror-horizontal="false" draw:mirror-vertical="false" draw:type="round-rectangle" draw:modifiers="1645.85300067431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/draw:g><draw:frame text:anchor-type="paragraph" draw:z-index="22" draw:name="Kształt 3" draw:style-name="gr18" draw:text-style-name="P17" svg:width="1.151cm" svg:height="0.571cm" draw:transform="rotate (1.5707963267949) translate (9.62906944444444cm 1.26470833333333cm)"><draw:text-box><text:p text:style-name="P6"><text:span text:style-name="T6">S/N:</text:span></text:p></draw:text-box></draw:frame><draw:custom-shape text:anchor-type="paragraph" draw:z-index="52" draw:name="Kształt 20" draw:style-name="gr13" draw:text-style-name="P4" svg:width="3.352cm" svg:height="1.9cm" svg:x="14.9cm" svg:y="0.464cm"><text:p/><draw:enhanced-geometry svg:viewBox="0 0 21600 21600" draw:path-stretchpoint-x="10800" draw:path-stretchpoint-y="10800" draw:text-areas="?f3 ?f4 ?f5 ?f6" draw:mirror-horizontal="false" draw:mirror-vertical="false" draw:type="round-rectangle" draw:modifiers="1645.85300067431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text:s text:c="149"/></text:p>
      <text:p text:style-name="P13"><text:s text:c="179"/></text:p>
      <text:p text:style-name="P13"><draw:frame text:anchor-type="paragraph" draw:z-index="51" draw:name="Kształt 19" draw:style-name="gr12" draw:text-style-name="P3" svg:width="3.052cm" svg:height="1.886cm" svg:x="15.05cm" svg:y="0.025cm"><draw:text-box><text:p text:style-name="P2"><text:span text:style-name="T1">rev 0.2 </text:span><text:span text:style-name="T2"><text:s/></text:span><text:span text:style-name="T1">SQ5NRY</text:span></text:p><text:p text:style-name="P2"><text:span text:style-name="T1">S/N:</text:span></text:p><text:p text:style-name="P2"><text:span text:style-name="T1"/></text:p><text:p text:style-name="P2"><text:span text:style-name="T2">Made in Poland</text:span></text:p></draw:text-box></draw:frame><text:s text:c="153"/></text:p>
      <text:p text:style-name="P13"/>
      <text:p text:style-name="P13"><draw:frame text:anchor-type="paragraph" draw:z-index="47" draw:name="Kształt2" draw:style-name="gr19" draw:text-style-name="P17" svg:width="3.502cm" svg:height="0.6cm" svg:x="1.048cm" svg:y="0.152cm"><draw:text-box><text:p text:style-name="P6"><text:span text:style-name="T7">rev 0.2 </text:span><text:span text:style-name="T8"><text:s/></text:span><text:span text:style-name="T7">SQ5NRY</text:span></text:p></draw:text-box></draw:frame><draw:frame text:anchor-type="paragraph" draw:z-index="21" draw:name="Kształt 2" draw:style-name="gr18" draw:text-style-name="P17" svg:width="3.601cm" svg:height="0.571cm" svg:x="5.8cm" svg:y="0.182cm"><draw:text-box><text:p text:style-name="P6"><text:span text:style-name="T8">Made in Poland</text:span></text:p></draw:text-box></draw:frame><text:s text:c="129"/></text:p>
      <text:p text:style-name="P13"><text:s text:c="28"/></text:p>
      <text:p text:style-name="P13"/>
      <text:p text:style-name="P13"><text:s text:c="233"/></text:p>
      <text:p text:style-name="P13"><draw:custom-shape text:anchor-type="paragraph" draw:z-index="23" draw:name="Kształt 4" draw:style-name="gr20" draw:text-style-name="P5" svg:width="14.5cm" svg:height="5.001cm" svg:x="0cm" svg:y="0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37" draw:name="Kształt 15" draw:style-name="gr21" draw:text-style-name="P19" svg:width="5.023cm" svg:height="1.001cm" svg:x="0.649cm" svg:y="0.27cm"><draw:text-box><text:p text:style-name="P18"><text:span text:style-name="T9">QO-100 transverter</text:span></text:p></draw:text-box></draw:frame><draw:line text:anchor-type="paragraph" draw:z-index="42" draw:name="Linia pozioma 1" draw:style-name="gr22" draw:text-style-name="P20" svg:x1="0.249cm" svg:y1="5.001cm" svg:x2="0.249cm" svg:y2="0cm"><text:p/></draw:line><draw:line text:anchor-type="paragraph" draw:z-index="43" draw:name="Linia pozioma 2" draw:style-name="gr22" draw:text-style-name="P20" svg:x1="14.25cm" svg:y1="5.001cm" svg:x2="14.25cm" svg:y2="0cm"><text:p/></draw:line><text:s text:c="74"/><draw:frame draw:style-name="fr1" draw:name="Obraz9" text:anchor-type="char" svg:x="6.899cm" svg:y="0.22cm" svg:width="3.193cm" svg:height="2.771cm" draw:z-index="40"><draw:image xlink:href="Pictures/10000001000001FB000001B894071158.png" xlink:type="simple" xlink:show="embed" xlink:actuate="onLoad" draw:mime-type="image/png"/></draw:frame><text:s text:c="2"/><draw:frame draw:style-name="fr1" draw:name="Obraz1 kopia 1" text:anchor-type="char" svg:x="12cm" svg:y="0.175cm" svg:width="1.344cm" svg:height="2.847cm" draw:z-index="36"><draw:image xlink:href="Pictures/100000000000037A0000075F3A40A28B.png" xlink:type="simple" xlink:show="embed" xlink:actuate="onLoad" draw:mime-type="image/png"/></draw:frame></text:p>
      <text:p text:style-name="P13"/>
      <text:p text:style-name="P13"/>
      <text:p text:style-name="P13"/>
      <text:p text:style-name="P13"><draw:frame text:anchor-type="paragraph" draw:z-index="24" draw:name="Kształt2_ 2" draw:style-name="gr23" draw:text-style-name="P22" svg:width="2.301cm" svg:height="0.895cm" svg:x="1.099cm" svg:y="0.273cm"><draw:text-box><text:p text:style-name="P21"><text:span text:style-name="T10">28V (13.8V)</text:span></text:p><text:p text:style-name="P21"><text:span text:style-name="T10">1.1A</text:span></text:p></draw:text-box></draw:frame><text:s text:c="172"/></text:p>
      <text:p text:style-name="P13"><draw:frame text:anchor-type="paragraph" draw:z-index="38" draw:name="Kształt2_ 4" draw:style-name="gr24" draw:text-style-name="P22" svg:width="1.502cm" svg:height="0.449cm" svg:x="4.048cm" svg:y="0.236cm"><draw:text-box><text:p text:style-name="P21"><text:span text:style-name="T10">max 5W</text:span></text:p></draw:text-box></draw:frame></text:p>
      <text:p text:style-name="P13"><draw:custom-shape text:anchor-type="paragraph" draw:z-index="31" draw:name="Kształt 12" draw:style-name="gr25" draw:text-style-name="P4" svg:width="2.001cm" svg:height="1.5cm" svg:x="6.301cm" svg:y="0.3cm"><text:p/><draw:enhanced-geometry svg:viewBox="0 0 21600 21600" draw:path-stretchpoint-x="10800" draw:path-stretchpoint-y="10800" draw:text-areas="?f3 ?f4 ?f5 ?f6" draw:mirror-horizontal="false" draw:mirror-vertical="false" draw:type="round-rectangle" draw:modifiers="1645.85300067431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draw:frame text:anchor-type="paragraph" draw:z-index="30" draw:name="Kształt2_ 6" draw:style-name="gr26" draw:text-style-name="P23" svg:width="1.802cm" svg:height="1.251cm" svg:x="6.421cm" svg:y="0.45cm"><draw:text-box><text:p text:style-name="P18"><text:span text:style-name="T11">RX ext</text:span></text:p><text:p text:style-name="P18"><text:span text:style-name="T11">ref out</text:span></text:p></draw:text-box></draw:frame><draw:custom-shape text:anchor-type="paragraph" draw:z-index="27" draw:name="Kształt 6" draw:style-name="gr27" draw:text-style-name="P4" svg:width="2.5cm" svg:height="1.5cm" svg:x="1cm" svg:y="0.3cm"><text:p/><draw:enhanced-geometry svg:viewBox="0 0 21600 21600" draw:path-stretchpoint-x="10800" draw:path-stretchpoint-y="10800" draw:text-areas="?f3 ?f4 ?f5 ?f6" draw:mirror-horizontal="false" draw:mirror-vertical="false" draw:type="round-rectangle" draw:modifiers="1645.85300067431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draw:custom-shape text:anchor-type="paragraph" draw:z-index="29" draw:name="Kształt 7" draw:style-name="gr25" draw:text-style-name="P4" svg:width="2.001cm" svg:height="1.5cm" svg:x="3.851cm" svg:y="0.3cm"><text:p/><draw:enhanced-geometry svg:viewBox="0 0 21600 21600" draw:path-stretchpoint-x="10800" draw:path-stretchpoint-y="10800" draw:text-areas="?f3 ?f4 ?f5 ?f6" draw:mirror-horizontal="false" draw:mirror-vertical="false" draw:type="round-rectangle" draw:modifiers="1645.85300067431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draw:custom-shape text:anchor-type="paragraph" draw:z-index="33" draw:name="Kształt 13" draw:style-name="gr28" draw:text-style-name="P4" svg:width="1.8cm" svg:height="1.5cm" svg:x="8.7cm" svg:y="0.3cm"><text:p/><draw:enhanced-geometry svg:viewBox="0 0 21600 21600" draw:path-stretchpoint-x="10800" draw:path-stretchpoint-y="10800" draw:text-areas="?f3 ?f4 ?f5 ?f6" draw:mirror-horizontal="false" draw:mirror-vertical="false" draw:type="round-rectangle" draw:modifiers="1645.85300067431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draw:frame text:anchor-type="paragraph" draw:z-index="34" draw:name="Kształt2_ 8" draw:style-name="gr29" draw:text-style-name="P23" svg:width="1.95cm" svg:height="1.138cm" svg:x="11.072cm" svg:y="0.46cm"><draw:text-box><text:p text:style-name="P18"><text:span text:style-name="T11">TX</text:span></text:p><text:p text:style-name="P18"><text:span text:style-name="T11">2.4G</text:span></text:p></draw:text-box></draw:frame><draw:custom-shape text:anchor-type="paragraph" draw:z-index="35" draw:name="Kształt 14" draw:style-name="gr27" draw:text-style-name="P4" svg:width="2.5cm" svg:height="1.5cm" svg:x="10.8cm" svg:y="0.3cm"><text:p/><draw:enhanced-geometry svg:viewBox="0 0 21600 21600" draw:path-stretchpoint-x="10800" draw:path-stretchpoint-y="10800" draw:text-areas="?f3 ?f4 ?f5 ?f6" draw:mirror-horizontal="false" draw:mirror-vertical="false" draw:type="round-rectangle" draw:modifiers="1645.85300067431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/text:p>
      <text:p text:style-name="P13"><draw:frame text:anchor-type="paragraph" draw:z-index="28" draw:name="Kształt2_ 5" draw:style-name="gr30" draw:text-style-name="P23" svg:width="1.574cm" svg:height="0.93cm" svg:x="4.048cm" svg:y="0.263cm"><draw:text-box><text:p text:style-name="P18"><text:span text:style-name="T11">TRX</text:span></text:p></draw:text-box></draw:frame><draw:frame text:anchor-type="paragraph" draw:z-index="32" draw:name="Kształt2_ 7" draw:style-name="gr31" draw:text-style-name="P23" svg:width="1.172cm" svg:height="0.971cm" svg:x="8.999cm" svg:y="0.263cm"><draw:text-box><text:p text:style-name="P18"><text:span text:style-name="T11">LNB</text:span></text:p></draw:text-box></draw:frame><draw:frame text:anchor-type="paragraph" draw:z-index="26" draw:name="Kształt2_ 3" draw:style-name="gr32" draw:text-style-name="P23" svg:width="2.251cm" svg:height="1.151cm" svg:x="1.12cm" svg:y="0.012cm"><draw:text-box><text:p text:style-name="P18"><text:span text:style-name="T11">DC</text:span></text:p><text:p text:style-name="P18"><text:span text:style-name="T11">PTT</text:span></text:p></draw:text-box></draw:frame></text:p>
      <text:p text:style-name="P13"><draw:custom-shape text:anchor-type="paragraph" draw:z-index="25" draw:name="Kształt4_ 9" draw:style-name="gr33" draw:text-style-name="P10" svg:width="0.75cm" svg:height="0.75cm" svg:x="0.101cm" svg:y="0.27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9" draw:name="Kształt4_ 6" draw:style-name="gr33" draw:text-style-name="P10" svg:width="0.75cm" svg:height="0.75cm" svg:x="13.651cm" svg:y="0.27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3"/>
      <text:p text:style-name="P13"/>
      <text:p text:style-name="P13"><text:s text:c="36"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 text:c="95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fill-image draw:name="Bitmap_20_1" draw:display-name="Bitmap 1" xlink:href="Pictures/20000009000009EC000009960E927D70.svm" xlink:type="simple" xlink:show="embed" xlink:actuate="onLoad"/>
    <draw:stroke-dash draw:name="Dash_20__28_Rounded_29_" draw:display-name="Dash (Rounded)" draw:style="round" draw:dots1="1" draw:dots1-length="201%" draw:distance="199%"/>
    <draw:stroke-dash draw:name="Double_20_Dash_20_Dot" draw:display-name="Double Dash Dot" draw:style="rect" draw:dots1="1" draw:dots1-length="454%" draw:dots2="1" draw:dots2-length="57%" draw:distance="17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10-29T21:40:13.766000000</meta:creation-date>
    <dc:date>2026-06-13T04:19:52.021759300</dc:date>
    <meta:editing-duration>P3DT11H54M20S</meta:editing-duration>
    <meta:editing-cycles>19</meta:editing-cycles>
    <meta:generator>LibreOffice/25.8.6.1$Windows_X86_64 LibreOffice_project/85297ec6e49ec4e6faaa6f11880d49294fc70e60</meta:generator>
    <meta:print-date>2026-06-12T16:47:05.248893100</meta:print-date>
    <meta:document-statistic meta:table-count="0" meta:image-count="11" meta:object-count="0" meta:page-count="1" meta:paragraph-count="12" meta:word-count="2" meta:character-count="1401" meta:non-whitespace-character-count="2"/>
  </office:meta>
</office:document-meta>
</file>